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Calibri, sans-serif" svg:font-family="'Calibri, sans-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1.656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49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619cm"/>
    </style:style>
    <style:style style:name="co9" style:family="table-column">
      <style:table-column-properties fo:break-before="auto" style:column-width="5.045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4.505cm"/>
    </style:style>
    <style:style style:name="co12" style:family="table-column">
      <style:table-column-properties fo:break-before="auto" style:column-width="5.101cm"/>
    </style:style>
    <style:style style:name="co13" style:family="table-column">
      <style:table-column-properties fo:break-before="auto" style:column-width="4.803cm"/>
    </style:style>
    <style:style style:name="co14" style:family="table-column">
      <style:table-column-properties fo:break-before="auto" style:column-width="2.849cm"/>
    </style:style>
    <style:style style:name="co15" style:family="table-column">
      <style:table-column-properties fo:break-before="auto" style:column-width="2.942cm"/>
    </style:style>
    <style:style style:name="co16" style:family="table-column">
      <style:table-column-properties fo:break-before="auto" style:column-width="1.545cm"/>
    </style:style>
    <style:style style:name="co17" style:family="table-column">
      <style:table-column-properties fo:break-before="auto" style:column-width="1.88cm"/>
    </style:style>
    <style:style style:name="co18" style:family="table-column">
      <style:table-column-properties fo:break-before="auto" style:column-width="4.897cm"/>
    </style:style>
    <style:style style:name="co19" style:family="table-column">
      <style:table-column-properties fo:break-before="auto" style:column-width="5.586cm"/>
    </style:style>
    <style:style style:name="co20" style:family="table-column">
      <style:table-column-properties fo:break-before="auto" style:column-width="1.471cm"/>
    </style:style>
    <style:style style:name="co21" style:family="table-column">
      <style:table-column-properties fo:break-before="auto" style:column-width="6.535cm"/>
    </style:style>
    <style:style style:name="co22" style:family="table-column">
      <style:table-column-properties fo:break-before="auto" style:column-width="1.341cm"/>
    </style:style>
    <style:style style:name="co23" style:family="table-column">
      <style:table-column-properties fo:break-before="auto" style:column-width="5.362cm"/>
    </style:style>
    <style:style style:name="co24" style:family="table-column">
      <style:table-column-properties fo:break-before="auto" style:column-width="3.073cm"/>
    </style:style>
    <style:style style:name="co25" style:family="table-column">
      <style:table-column-properties fo:break-before="auto" style:column-width="3.799cm"/>
    </style:style>
    <style:style style:name="co26" style:family="table-column">
      <style:table-column-properties fo:break-before="auto" style:column-width="2.067cm"/>
    </style:style>
    <style:style style:name="co27" style:family="table-column">
      <style:table-column-properties fo:break-before="auto" style:column-width="4.039cm"/>
    </style:style>
    <style:style style:name="co28" style:family="table-column">
      <style:table-column-properties fo:break-before="auto" style:column-width="4.674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5.399cm"/>
    </style:style>
    <style:style style:name="co31" style:family="table-column">
      <style:table-column-properties fo:break-before="auto" style:column-width="3.854cm"/>
    </style:style>
    <style:style style:name="co32" style:family="table-column">
      <style:table-column-properties fo:break-before="auto" style:column-width="5.995cm"/>
    </style:style>
    <style:style style:name="co33" style:family="table-column">
      <style:table-column-properties fo:break-before="auto" style:column-width="4.692cm"/>
    </style:style>
    <style:style style:name="co34" style:family="table-column">
      <style:table-column-properties fo:break-before="auto" style:column-width="2.159cm"/>
    </style:style>
    <style:style style:name="co35" style:family="table-column">
      <style:table-column-properties fo:break-before="auto" style:column-width="2.215cm"/>
    </style:style>
    <style:style style:name="co36" style:family="table-column">
      <style:table-column-properties fo:break-before="auto" style:column-width="4.37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Project_20_Instructions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Sales">
      <style:table-properties table:display="true" style:writing-mode="lr-tb"/>
    </style:style>
    <style:style style:name="ta4" style:family="table" style:master-page-name="PageStyle_5f_Employe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, sans-serif" fo:font-size="11pt" fo:font-style="normal" fo:text-shadow="none" style:text-underline-style="none" fo:font-weight="bold" style:font-size-asian="11pt" style:font-style-asian="normal" style:font-weight-asian="bold" style:font-name-complex="Calibri, sans-serif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ackground-color="#a6cae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order-bottom="0.74pt solid #000000" fo:background-color="#a6ca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ackground-color="#a6cae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a6cae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fo:background-color="#83cbe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Currency" style:data-style-name="N12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83cbe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83cbe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61cb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, sans-serif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, sans-serif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, sans-serif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, sans-serif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38761d" style:font-name="Calibri, sans-serif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, sans-serif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38761d" style:font-name="Calibri, sans-serif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, sans-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Instructions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PR. 1 Fundamental Booster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2" office:value-type="string" calcext:value-type="string">
            <text:p><text:span text:style-name="T1">Topics:</text:span></text:p>
            <text:p><text:span text:style-name="T2"> - Relative &amp; Absolute References, Formatting, Data Input</text:span></text:p>
            <text:p><text:span text:style-name="T2"> - IF Formulas, Nested IFs, IF with AND/OR</text:span></text:p>
            <text:p><text:span text:style-name="T2"> - COUNTIFS, SUMIFS, AVERAGEIFS</text:span></text:p>
            <text:p><text:span text:style-name="T2"> - Lookup Functions (VLOOKUP, XLOOKUP, XMATCH)</text:span></text:p>
            <text:p><text:span text:style-name="T2"> - INDEX/MATCH for dynamic searches</text:span></text:p>
            <text:p><text:span text:style-name="T2"> - TEXT Functions for string manipulations</text:span></text:p>
            <text:p><text:span text:style-name="T2"> - INDIRECT and OFFSET for dynamic references</text:span></text:p>
            <text:p><text:span text:style-name="T2"> - Date/Time, Math Functions, FILTER function</text:span></text:p>
            <text:p><text:span text:style-name="T2">  </text:span></text:p>
            <text:p><text:span text:style-name="T3">Main Tasks:</text:span></text:p>
            <text:p><text:span text:style-name="T4"> 1. Apply IF formulas to classify student grades.</text:span></text:p>
            <text:p><text:span text:style-name="T4"> 2. Use COUNTIFS to count students scoring above 60.</text:span></text:p>
            <text:p><text:span text:style-name="T4"> 3. Use VLOOKUP to find a product price from sales data.</text:span></text:p>
            <text:p><text:span text:style-name="T4"> 4. Apply XLOOKUP to fetch employee salaries dynamically.</text:span></text:p>
            <text:p><text:span text:style-name="T4"> 5. Format and analyze date of joining in Employee data.</text:span></text:p>
            <text:p><text:span text:style-name="T4"> 6. Use FILTER function to extract students with grades above 80.</text:span></text:p>
            <text:p><text:span text:style-name="T2"> </text:span></text:p>
            <text:p><text:span text:style-name="T1">Deliverable:</text:span></text:p>
            <text:p><text:span text:style-name="T2">Complete the given worksheets by applying the required formulas in respective sheets.</text:span></text:p>
          </table:table-cell>
          <table:table-cell table:style-name="ce3" table:number-columns-repeated="25"/>
          <table:table-cell table:number-columns-repeated="16358"/>
        </table:table-row>
        <table:table-row table:style-name="ro1" table:number-rows-repeated="2">
          <table:table-cell table:style-name="ce3" table:number-columns-repeated="26"/>
          <table:table-cell table:number-columns-repeated="16358"/>
        </table:table-row>
        <table:table-row table:style-name="ro1">
          <table:table-cell table:style-name="ce1" office:value-type="string" calcext:value-type="string">
            <text:p>Essential Task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Relative &amp; Absolute Cell References, Formatting, and Data Input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Enter and format data (bold, italic, currency, date, custom formats)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Use absolute ($A$1) and relative (A1) references in formula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Using IF Formula &amp; Nesting IF Formula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lassify students' grades based on their score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ompute discounts for sales based on price threshold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Using IF with AND/OR Formula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Identify students who scored above 80 in both Math &amp; Science using IF(AND(...))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Determine whether a product is eligible for discount using IF(OR(...))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COUNTIFS, SUMIFS, AVERAGEIF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ount the number of students who scored above 50 in Math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Sum total sales for a specific region and product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alculate the average score for students who scored above 60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VLOOKUP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Fetch student names based on ID from a separate dataset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Retrieve product prices based on product code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INDEX and MATCH Function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Find sales values for a specific salesperson in a specific month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Look up employee details dynamically without column restriction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Excel TEXT Function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Extract the first name from full names using LEFT and FIND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onvert names to uppercase/lowercase using UPPER(), LOWER()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XLOOKUP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Search for salesperson performance based on flexible search criteria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Find employee salaries without worrying about sorted data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XMATCH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Find the position of a product in a sales list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INDIRECT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Dynamically reference a cell range using INDIRECT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OFFSET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reate dynamic ranges for sales trend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Date and Time Function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Calculate age from date of birth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Find the difference in days between two date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Math Functions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Use ROUND(), CEILING(), and FLOOR() for financial calculations.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/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Return Multiple Values using FILTER Function</text:p>
          </table:table-cell>
          <table:table-cell table:style-name="ce3" table:number-columns-repeated="25"/>
          <table:table-cell table:number-columns-repeated="16358"/>
        </table:table-row>
        <table:table-row table:style-name="ro1">
          <table:table-cell table:style-name="ce5" office:value-type="string" calcext:value-type="string">
            <text:p>Extract a list of top-performing students based on scores.</text:p>
          </table:table-cell>
          <table:table-cell table:style-name="ce3" table:number-columns-repeated="25"/>
          <table:table-cell table:number-columns-repeated="16358"/>
        </table:table-row>
        <table:table-row table:style-name="ro1" table:number-rows-repeated="200">
          <table:table-cell table:style-name="ce3" table:number-columns-repeated="26"/>
          <table:table-cell table:number-columns-repeated="16358"/>
        </table:table-row>
        <table:table-row table:style-name="ro1" table:number-rows-repeated="10483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udents" table:style-name="ta2"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9" table:default-cell-style-name="ce9"/>
        <table:table-column table:style-name="co14" table:default-cell-style-name="ce9"/>
        <table:table-column table:style-name="co5" table:number-columns-repeated="16368" table:default-cell-style-name="ce9"/>
        <table:table-row table:style-name="ro1">
          <table:table-cell table:style-name="ce7" office:value-type="string" calcext:value-type="string">
            <text:p>Student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th</text:p>
          </table:table-cell>
          <table:table-cell table:style-name="ce7" office:value-type="string" calcext:value-type="string">
            <text:p>Science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Enrollment Da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Above 80 in Math &amp; Science</text:p>
          </table:table-cell>
          <table:table-cell table:style-name="ce14" office:value-type="string" calcext:value-type="string">
            <text:p>First Name</text:p>
          </table:table-cell>
          <table:table-cell table:style-name="ce14" office:value-type="string" calcext:value-type="string">
            <text:p>UPPER function</text:p>
          </table:table-cell>
          <table:table-cell table:style-name="ce14" office:value-type="string" calcext:value-type="string">
            <text:p>LOWER function</text:p>
          </table:table-cell>
          <table:table-cell table:style-name="ce14" office:value-type="string" calcext:value-type="string">
            <text:p>VLOOKUP(Student Name by ID)</text:p>
          </table:table-cell>
          <table:table-cell table:number-columns-repeated="16370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8" office:value-type="string" calcext:value-type="string">
            <text:p>Anuradha Prajapati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2]+[.D2]+[.E2]" office:value-type="float" office:value="279" calcext:value-type="float">
            <text:p>279</text:p>
          </table:table-cell>
          <table:table-cell table:style-name="ce13" table:formula="of:=AVERAGE([.C2:.E2])" office:value-type="float" office:value="93" calcext:value-type="float">
            <text:p>93.00</text:p>
          </table:table-cell>
          <table:table-cell table:style-name="ce8" table:formula="of:=IF([.H2]&gt;=90;&quot;A+&quot;;IF([.H2]&gt;=80;&quot;A&quot;;IF([.H2]&gt;=60;&quot;B&quot;;IF([.H2]&gt;=33;&quot;C&quot;;&quot;Fail&quot;))))" office:value-type="string" office:string-value="A+" calcext:value-type="string">
            <text:p>A+</text:p>
          </table:table-cell>
          <table:table-cell table:style-name="ce8" table:formula="of:=IF(AND([.C2]&gt;80;[.D2]&gt;80);&quot;Yes&quot;;&quot;No&quot;)" office:value-type="string" office:string-value="Yes" calcext:value-type="string">
            <text:p>Yes</text:p>
          </table:table-cell>
          <table:table-cell table:style-name="ce8" table:formula="of:=LEFT([.B2];FIND(&quot; &quot;;[.B2])-1)" office:value-type="string" office:string-value="Anuradha" calcext:value-type="string">
            <text:p>Anuradha</text:p>
          </table:table-cell>
          <table:table-cell table:style-name="ce8" table:formula="of:=UPPER([.B2])" office:value-type="string" office:string-value="ANURADHA PRAJAPATI" calcext:value-type="string">
            <text:p>ANURADHA PRAJAPATI</text:p>
          </table:table-cell>
          <table:table-cell table:style-name="ce8" table:formula="of:=LOWER([.B2])" office:value-type="string" office:string-value="anuradha prajapati" calcext:value-type="string">
            <text:p>anuradha prajapati</text:p>
          </table:table-cell>
          <table:table-cell table:style-name="ce8" table:formula="of:=VLOOKUP(1001;[.A2:.B21];2;FALSE())" office:value-type="string" office:string-value="Anuradha Prajapati" calcext:value-type="string">
            <text:p>Anuradha Prajapati</text:p>
          </table:table-cell>
          <table:table-cell table:number-columns-repeated="16370"/>
        </table:table-row>
        <table:table-row table:style-name="ro1">
          <table:table-cell table:style-name="ce8" office:value-type="float" office:value="1002" calcext:value-type="float">
            <text:p>1002</text:p>
          </table:table-cell>
          <table:table-cell table:style-name="ce8" office:value-type="string" calcext:value-type="string">
            <text:p>Yashraj Sharm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3]+[.D3]+[.E3]" office:value-type="float" office:value="289" calcext:value-type="float">
            <text:p>289</text:p>
          </table:table-cell>
          <table:table-cell table:style-name="ce13" table:formula="of:=AVERAGE([.C3:.E3])" office:value-type="float" office:value="96.3333333333333" calcext:value-type="float">
            <text:p>96.33</text:p>
          </table:table-cell>
          <table:table-cell table:style-name="ce8" table:formula="of:=IF([.H3]&gt;=90;&quot;A+&quot;;IF([.H3]&gt;=80;&quot;A&quot;;IF([.H3]&gt;=60;&quot;B&quot;;IF([.H3]&gt;=33;&quot;C&quot;;&quot;Fail&quot;))))" office:value-type="string" office:string-value="A+" calcext:value-type="string">
            <text:p>A+</text:p>
          </table:table-cell>
          <table:table-cell table:style-name="ce8" table:formula="of:=IF(AND([.C3]&gt;80;[.D3]&gt;80);&quot;Yes&quot;;&quot;No&quot;)" office:value-type="string" office:string-value="Yes" calcext:value-type="string">
            <text:p>Yes</text:p>
          </table:table-cell>
          <table:table-cell table:style-name="ce8" table:formula="of:=LEFT([.B3];FIND(&quot; &quot;;[.B3])-1)" office:value-type="string" office:string-value="Yashraj" calcext:value-type="string">
            <text:p>Yashraj</text:p>
          </table:table-cell>
          <table:table-cell table:style-name="ce8" table:formula="of:=UPPER([.B3])" office:value-type="string" office:string-value="YASHRAJ SHARMA" calcext:value-type="string">
            <text:p>YASHRAJ SHARMA</text:p>
          </table:table-cell>
          <table:table-cell table:style-name="ce8" table:formula="of:=LOWER([.B3])" office:value-type="string" office:string-value="yashraj sharma" calcext:value-type="string">
            <text:p>yashraj sharma</text:p>
          </table:table-cell>
          <table:table-cell table:style-name="ce8" table:formula="of:=VLOOKUP(1002;[.A2:.B21];2;FALSE())" office:value-type="string" office:string-value="Yashraj Sharma" calcext:value-type="string">
            <text:p>Yashraj Sharma</text:p>
          </table:table-cell>
          <table:table-cell table:number-columns-repeated="16370"/>
        </table:table-row>
        <table:table-row table:style-name="ro1">
          <table:table-cell table:style-name="ce8" office:value-type="float" office:value="1003" calcext:value-type="float">
            <text:p>1003</text:p>
          </table:table-cell>
          <table:table-cell table:style-name="ce8" office:value-type="string" calcext:value-type="string">
            <text:p>Punit Mishra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4]+[.D4]+[.E4]" office:value-type="float" office:value="266" calcext:value-type="float">
            <text:p>266</text:p>
          </table:table-cell>
          <table:table-cell table:style-name="ce13" table:formula="of:=AVERAGE([.C4:.E4])" office:value-type="float" office:value="88.6666666666667" calcext:value-type="float">
            <text:p>88.67</text:p>
          </table:table-cell>
          <table:table-cell table:style-name="ce8" table:formula="of:=IF([.H4]&gt;=90;&quot;A+&quot;;IF([.H4]&gt;=80;&quot;A&quot;;IF([.H4]&gt;=60;&quot;B&quot;;IF([.H4]&gt;=33;&quot;C&quot;;&quot;Fail&quot;))))" office:value-type="string" office:string-value="A" calcext:value-type="string">
            <text:p>A</text:p>
          </table:table-cell>
          <table:table-cell table:style-name="ce8" table:formula="of:=IF(AND([.C4]&gt;80;[.D4]&gt;80);&quot;Yes&quot;;&quot;No&quot;)" office:value-type="string" office:string-value="Yes" calcext:value-type="string">
            <text:p>Yes</text:p>
          </table:table-cell>
          <table:table-cell table:style-name="ce8" table:formula="of:=LEFT([.B4];FIND(&quot; &quot;;[.B4])-1)" office:value-type="string" office:string-value="Punit" calcext:value-type="string">
            <text:p>Punit</text:p>
          </table:table-cell>
          <table:table-cell table:style-name="ce8" table:formula="of:=UPPER([.B4])" office:value-type="string" office:string-value="PUNIT MISHRA" calcext:value-type="string">
            <text:p>PUNIT MISHRA</text:p>
          </table:table-cell>
          <table:table-cell table:style-name="ce8" table:formula="of:=LOWER([.B4])" office:value-type="string" office:string-value="punit mishra" calcext:value-type="string">
            <text:p>punit mishra</text:p>
          </table:table-cell>
          <table:table-cell table:style-name="ce8" table:formula="of:=VLOOKUP(1003;[.A2:.B21];2;FALSE())" office:value-type="string" office:string-value="Punit Mishra" calcext:value-type="string">
            <text:p>Punit Mishra</text:p>
          </table:table-cell>
          <table:table-cell table:number-columns-repeated="16370"/>
        </table:table-row>
        <table:table-row table:style-name="ro1">
          <table:table-cell table:style-name="ce8" office:value-type="float" office:value="1004" calcext:value-type="float">
            <text:p>1004</text:p>
          </table:table-cell>
          <table:table-cell table:style-name="ce8" office:value-type="string" calcext:value-type="string">
            <text:p>Amit Maharan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5]+[.D5]+[.E5]" office:value-type="float" office:value="249" calcext:value-type="float">
            <text:p>249</text:p>
          </table:table-cell>
          <table:table-cell table:style-name="ce13" table:formula="of:=AVERAGE([.C5:.E5])" office:value-type="float" office:value="83" calcext:value-type="float">
            <text:p>83.00</text:p>
          </table:table-cell>
          <table:table-cell table:style-name="ce8" table:formula="of:=IF([.H5]&gt;=90;&quot;A+&quot;;IF([.H5]&gt;=80;&quot;A&quot;;IF([.H5]&gt;=60;&quot;B&quot;;IF([.H5]&gt;=33;&quot;C&quot;;&quot;Fail&quot;))))" office:value-type="string" office:string-value="A" calcext:value-type="string">
            <text:p>A</text:p>
          </table:table-cell>
          <table:table-cell table:style-name="ce8" table:formula="of:=IF(AND([.C5]&gt;80;[.D5]&gt;80);&quot;Yes&quot;;&quot;No&quot;)" office:value-type="string" office:string-value="No" calcext:value-type="string">
            <text:p>No</text:p>
          </table:table-cell>
          <table:table-cell table:style-name="ce8" table:formula="of:=LEFT([.B5];FIND(&quot; &quot;;[.B5])-1)" office:value-type="string" office:string-value="Amit" calcext:value-type="string">
            <text:p>Amit</text:p>
          </table:table-cell>
          <table:table-cell table:style-name="ce8" table:formula="of:=UPPER([.B5])" office:value-type="string" office:string-value="AMIT MAHARANA" calcext:value-type="string">
            <text:p>AMIT MAHARANA</text:p>
          </table:table-cell>
          <table:table-cell table:style-name="ce8" table:formula="of:=LOWER([.B5])" office:value-type="string" office:string-value="amit maharana" calcext:value-type="string">
            <text:p>amit maharana</text:p>
          </table:table-cell>
          <table:table-cell table:style-name="ce8" table:formula="of:=VLOOKUP(1004;[.A2:.B21];2;FALSE())" office:value-type="string" office:string-value="Amit Maharana" calcext:value-type="string">
            <text:p>Amit Maharana</text:p>
          </table:table-cell>
          <table:table-cell table:number-columns-repeated="16370"/>
        </table:table-row>
        <table:table-row table:style-name="ro1">
          <table:table-cell table:style-name="ce8" office:value-type="float" office:value="1005" calcext:value-type="float">
            <text:p>1005</text:p>
          </table:table-cell>
          <table:table-cell table:style-name="ce8" office:value-type="string" calcext:value-type="string">
            <text:p>Abhiraj Sharm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8" calcext:value-type="float">
            <text:p>78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6]+[.D6]+[.E6]" office:value-type="float" office:value="252" calcext:value-type="float">
            <text:p>252</text:p>
          </table:table-cell>
          <table:table-cell table:style-name="ce13" table:formula="of:=AVERAGE([.C6:.E6])" office:value-type="float" office:value="84" calcext:value-type="float">
            <text:p>84.00</text:p>
          </table:table-cell>
          <table:table-cell table:style-name="ce8" table:formula="of:=IF([.H6]&gt;=90;&quot;A+&quot;;IF([.H6]&gt;=80;&quot;A&quot;;IF([.H6]&gt;=60;&quot;B&quot;;IF([.H6]&gt;=33;&quot;C&quot;;&quot;Fail&quot;))))" office:value-type="string" office:string-value="A" calcext:value-type="string">
            <text:p>A</text:p>
          </table:table-cell>
          <table:table-cell table:style-name="ce8" table:formula="of:=IF(AND([.C6]&gt;80;[.D6]&gt;80);&quot;Yes&quot;;&quot;No&quot;)" office:value-type="string" office:string-value="No" calcext:value-type="string">
            <text:p>No</text:p>
          </table:table-cell>
          <table:table-cell table:style-name="ce8" table:formula="of:=LEFT([.B6];FIND(&quot; &quot;;[.B6])-1)" office:value-type="string" office:string-value="Abhiraj" calcext:value-type="string">
            <text:p>Abhiraj</text:p>
          </table:table-cell>
          <table:table-cell table:style-name="ce8" table:formula="of:=UPPER([.B6])" office:value-type="string" office:string-value="ABHIRAJ SHARMA" calcext:value-type="string">
            <text:p>ABHIRAJ SHARMA</text:p>
          </table:table-cell>
          <table:table-cell table:style-name="ce8" table:formula="of:=LOWER([.B6])" office:value-type="string" office:string-value="abhiraj sharma" calcext:value-type="string">
            <text:p>abhiraj sharma</text:p>
          </table:table-cell>
          <table:table-cell table:style-name="ce8" table:formula="of:=VLOOKUP(1005;[.A2:.B21];2;FALSE())" office:value-type="string" office:string-value="Abhiraj Sharma" calcext:value-type="string">
            <text:p>Abhiraj Sharma</text:p>
          </table:table-cell>
          <table:table-cell table:number-columns-repeated="16370"/>
        </table:table-row>
        <table:table-row table:style-name="ro1">
          <table:table-cell table:style-name="ce8" office:value-type="float" office:value="1006" calcext:value-type="float">
            <text:p>1006</text:p>
          </table:table-cell>
          <table:table-cell table:style-name="ce8" office:value-type="string" calcext:value-type="string">
            <text:p>Vaibhavraj Sharma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7]+[.D7]+[.E7]" office:value-type="float" office:value="292" calcext:value-type="float">
            <text:p>292</text:p>
          </table:table-cell>
          <table:table-cell table:style-name="ce13" table:formula="of:=AVERAGE([.C7:.E7])" office:value-type="float" office:value="97.3333333333333" calcext:value-type="float">
            <text:p>97.33</text:p>
          </table:table-cell>
          <table:table-cell table:style-name="ce8" table:formula="of:=IF([.H7]&gt;=90;&quot;A+&quot;;IF([.H7]&gt;=80;&quot;A&quot;;IF([.H7]&gt;=60;&quot;B&quot;;IF([.H7]&gt;=33;&quot;C&quot;;&quot;Fail&quot;))))" office:value-type="string" office:string-value="A+" calcext:value-type="string">
            <text:p>A+</text:p>
          </table:table-cell>
          <table:table-cell table:style-name="ce8" table:formula="of:=IF(AND([.C7]&gt;80;[.D7]&gt;80);&quot;Yes&quot;;&quot;No&quot;)" office:value-type="string" office:string-value="Yes" calcext:value-type="string">
            <text:p>Yes</text:p>
          </table:table-cell>
          <table:table-cell table:style-name="ce8" table:formula="of:=LEFT([.B7];FIND(&quot; &quot;;[.B7])-1)" office:value-type="string" office:string-value="Vaibhavraj" calcext:value-type="string">
            <text:p>Vaibhavraj</text:p>
          </table:table-cell>
          <table:table-cell table:style-name="ce8" table:formula="of:=UPPER([.B7])" office:value-type="string" office:string-value="VAIBHAVRAJ SHARMA" calcext:value-type="string">
            <text:p>VAIBHAVRAJ SHARMA</text:p>
          </table:table-cell>
          <table:table-cell table:style-name="ce8" table:formula="of:=LOWER([.B7])" office:value-type="string" office:string-value="vaibhavraj sharma" calcext:value-type="string">
            <text:p>vaibhavraj sharma</text:p>
          </table:table-cell>
          <table:table-cell table:style-name="ce8" table:formula="of:=VLOOKUP(1006;[.A2:.B21];2;FALSE())" office:value-type="string" office:string-value="Vaibhavraj Sharma" calcext:value-type="string">
            <text:p>Vaibhavraj Sharma</text:p>
          </table:table-cell>
          <table:table-cell table:number-columns-repeated="16370"/>
        </table:table-row>
        <table:table-row table:style-name="ro1">
          <table:table-cell table:style-name="ce8" office:value-type="float" office:value="1007" calcext:value-type="float">
            <text:p>1007</text:p>
          </table:table-cell>
          <table:table-cell table:style-name="ce8" office:value-type="string" calcext:value-type="string">
            <text:p>Sugam Pradhan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5" calcext:value-type="float">
            <text:p>55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8]+[.D8]+[.E8]" office:value-type="float" office:value="206" calcext:value-type="float">
            <text:p>206</text:p>
          </table:table-cell>
          <table:table-cell table:style-name="ce13" table:formula="of:=AVERAGE([.C8:.E8])" office:value-type="float" office:value="68.6666666666667" calcext:value-type="float">
            <text:p>68.67</text:p>
          </table:table-cell>
          <table:table-cell table:style-name="ce8" table:formula="of:=IF([.H8]&gt;=90;&quot;A+&quot;;IF([.H8]&gt;=80;&quot;A&quot;;IF([.H8]&gt;=60;&quot;B&quot;;IF([.H8]&gt;=33;&quot;C&quot;;&quot;Fail&quot;))))" office:value-type="string" office:string-value="B" calcext:value-type="string">
            <text:p>B</text:p>
          </table:table-cell>
          <table:table-cell table:style-name="ce8" table:formula="of:=IF(AND([.C8]&gt;80;[.D8]&gt;80);&quot;Yes&quot;;&quot;No&quot;)" office:value-type="string" office:string-value="No" calcext:value-type="string">
            <text:p>No</text:p>
          </table:table-cell>
          <table:table-cell table:style-name="ce8" table:formula="of:=LEFT([.B8];FIND(&quot; &quot;;[.B8])-1)" office:value-type="string" office:string-value="Sugam" calcext:value-type="string">
            <text:p>Sugam</text:p>
          </table:table-cell>
          <table:table-cell table:style-name="ce8" table:formula="of:=UPPER([.B8])" office:value-type="string" office:string-value="SUGAM PRADHAN" calcext:value-type="string">
            <text:p>SUGAM PRADHAN</text:p>
          </table:table-cell>
          <table:table-cell table:style-name="ce8" table:formula="of:=LOWER([.B8])" office:value-type="string" office:string-value="sugam pradhan" calcext:value-type="string">
            <text:p>sugam pradhan</text:p>
          </table:table-cell>
          <table:table-cell table:style-name="ce8" table:formula="of:=VLOOKUP(1007;[.A2:.B21];2;FALSE())" office:value-type="string" office:string-value="Sugam Pradhan" calcext:value-type="string">
            <text:p>Sugam Pradhan</text:p>
          </table:table-cell>
          <table:table-cell table:number-columns-repeated="16370"/>
        </table:table-row>
        <table:table-row table:style-name="ro1">
          <table:table-cell table:style-name="ce8" office:value-type="float" office:value="1008" calcext:value-type="float">
            <text:p>1008</text:p>
          </table:table-cell>
          <table:table-cell table:style-name="ce8" office:value-type="string" calcext:value-type="string">
            <text:p>Prabhat Pandey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90" calcext:value-type="float">
            <text:p>90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9]+[.D9]+[.E9]" office:value-type="float" office:value="216" calcext:value-type="float">
            <text:p>216</text:p>
          </table:table-cell>
          <table:table-cell table:style-name="ce13" table:formula="of:=AVERAGE([.C9:.E9])" office:value-type="float" office:value="72" calcext:value-type="float">
            <text:p>72.00</text:p>
          </table:table-cell>
          <table:table-cell table:style-name="ce8" table:formula="of:=IF([.H9]&gt;=90;&quot;A+&quot;;IF([.H9]&gt;=80;&quot;A&quot;;IF([.H9]&gt;=60;&quot;B&quot;;IF([.H9]&gt;=33;&quot;C&quot;;&quot;Fail&quot;))))" office:value-type="string" office:string-value="B" calcext:value-type="string">
            <text:p>B</text:p>
          </table:table-cell>
          <table:table-cell table:style-name="ce8" table:formula="of:=IF(AND([.C9]&gt;80;[.D9]&gt;80);&quot;Yes&quot;;&quot;No&quot;)" office:value-type="string" office:string-value="No" calcext:value-type="string">
            <text:p>No</text:p>
          </table:table-cell>
          <table:table-cell table:style-name="ce8" table:formula="of:=LEFT([.B9];FIND(&quot; &quot;;[.B9])-1)" office:value-type="string" office:string-value="Prabhat" calcext:value-type="string">
            <text:p>Prabhat</text:p>
          </table:table-cell>
          <table:table-cell table:style-name="ce8" table:formula="of:=UPPER([.B9])" office:value-type="string" office:string-value="PRABHAT PANDEY" calcext:value-type="string">
            <text:p>PRABHAT PANDEY</text:p>
          </table:table-cell>
          <table:table-cell table:style-name="ce8" table:formula="of:=LOWER([.B9])" office:value-type="string" office:string-value="prabhat pandey" calcext:value-type="string">
            <text:p>prabhat pandey</text:p>
          </table:table-cell>
          <table:table-cell table:style-name="ce8" table:formula="of:=VLOOKUP(1008;[.A2:.B21];2;FALSE())" office:value-type="string" office:string-value="Prabhat Pandey" calcext:value-type="string">
            <text:p>Prabhat Pandey</text:p>
          </table:table-cell>
          <table:table-cell table:number-columns-repeated="16370"/>
        </table:table-row>
        <table:table-row table:style-name="ro1">
          <table:table-cell table:style-name="ce8" office:value-type="float" office:value="1009" calcext:value-type="float">
            <text:p>1009</text:p>
          </table:table-cell>
          <table:table-cell table:style-name="ce8" office:value-type="string" calcext:value-type="string">
            <text:p>Deepak Paswan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0]+[.D10]+[.E10]" office:value-type="float" office:value="209" calcext:value-type="float">
            <text:p>209</text:p>
          </table:table-cell>
          <table:table-cell table:style-name="ce13" table:formula="of:=AVERAGE([.C10:.E10])" office:value-type="float" office:value="69.6666666666667" calcext:value-type="float">
            <text:p>69.67</text:p>
          </table:table-cell>
          <table:table-cell table:style-name="ce8" table:formula="of:=IF([.H10]&gt;=90;&quot;A+&quot;;IF([.H10]&gt;=80;&quot;A&quot;;IF([.H10]&gt;=60;&quot;B&quot;;IF([.H10]&gt;=33;&quot;C&quot;;&quot;Fail&quot;))))" office:value-type="string" office:string-value="B" calcext:value-type="string">
            <text:p>B</text:p>
          </table:table-cell>
          <table:table-cell table:style-name="ce8" table:formula="of:=IF(AND([.C10]&gt;80;[.D10]&gt;80);&quot;Yes&quot;;&quot;No&quot;)" office:value-type="string" office:string-value="No" calcext:value-type="string">
            <text:p>No</text:p>
          </table:table-cell>
          <table:table-cell table:style-name="ce8" table:formula="of:=LEFT([.B10];FIND(&quot; &quot;;[.B10])-1)" office:value-type="string" office:string-value="Deepak" calcext:value-type="string">
            <text:p>Deepak</text:p>
          </table:table-cell>
          <table:table-cell table:style-name="ce8" table:formula="of:=UPPER([.B10])" office:value-type="string" office:string-value="DEEPAK PASWAN" calcext:value-type="string">
            <text:p>DEEPAK PASWAN</text:p>
          </table:table-cell>
          <table:table-cell table:style-name="ce8" table:formula="of:=LOWER([.B10])" office:value-type="string" office:string-value="deepak paswan" calcext:value-type="string">
            <text:p>deepak paswan</text:p>
          </table:table-cell>
          <table:table-cell table:style-name="ce8" table:formula="of:=VLOOKUP(1009;[.A2:.B21];2;FALSE())" office:value-type="string" office:string-value="Deepak Paswan" calcext:value-type="string">
            <text:p>Deepak Paswan</text:p>
          </table:table-cell>
          <table:table-cell table:number-columns-repeated="16370"/>
        </table:table-row>
        <table:table-row table:style-name="ro1">
          <table:table-cell table:style-name="ce8" office:value-type="float" office:value="1010" calcext:value-type="float">
            <text:p>1010</text:p>
          </table:table-cell>
          <table:table-cell table:style-name="ce8" office:value-type="string" calcext:value-type="string">
            <text:p>Keshav Singh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9" calcext:value-type="float">
            <text:p>69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1]+[.D11]+[.E11]" office:value-type="float" office:value="176" calcext:value-type="float">
            <text:p>176</text:p>
          </table:table-cell>
          <table:table-cell table:style-name="ce13" table:formula="of:=AVERAGE([.C11:.E11])" office:value-type="float" office:value="58.6666666666667" calcext:value-type="float">
            <text:p>58.67</text:p>
          </table:table-cell>
          <table:table-cell table:style-name="ce8" table:formula="of:=IF([.H11]&gt;=90;&quot;A+&quot;;IF([.H11]&gt;=80;&quot;A&quot;;IF([.H11]&gt;=60;&quot;B&quot;;IF([.H11]&gt;=33;&quot;C&quot;;&quot;Fail&quot;))))" office:value-type="string" office:string-value="C" calcext:value-type="string">
            <text:p>C</text:p>
          </table:table-cell>
          <table:table-cell table:style-name="ce8" table:formula="of:=IF(AND([.C11]&gt;80;[.D11]&gt;80);&quot;Yes&quot;;&quot;No&quot;)" office:value-type="string" office:string-value="No" calcext:value-type="string">
            <text:p>No</text:p>
          </table:table-cell>
          <table:table-cell table:style-name="ce8" table:formula="of:=LEFT([.B11];FIND(&quot; &quot;;[.B11])-1)" office:value-type="string" office:string-value="Keshav" calcext:value-type="string">
            <text:p>Keshav</text:p>
          </table:table-cell>
          <table:table-cell table:style-name="ce8" table:formula="of:=UPPER([.B11])" office:value-type="string" office:string-value="KESHAV SINGH" calcext:value-type="string">
            <text:p>KESHAV SINGH</text:p>
          </table:table-cell>
          <table:table-cell table:style-name="ce8" table:formula="of:=LOWER([.B11])" office:value-type="string" office:string-value="keshav singh" calcext:value-type="string">
            <text:p>keshav singh</text:p>
          </table:table-cell>
          <table:table-cell table:style-name="ce8" table:formula="of:=VLOOKUP(1010;[.A2:.B21];2;FALSE())" office:value-type="string" office:string-value="Keshav Singh" calcext:value-type="string">
            <text:p>Keshav Singh</text:p>
          </table:table-cell>
          <table:table-cell table:number-columns-repeated="16370"/>
        </table:table-row>
        <table:table-row table:style-name="ro1">
          <table:table-cell table:style-name="ce8" office:value-type="float" office:value="1011" calcext:value-type="float">
            <text:p>1011</text:p>
          </table:table-cell>
          <table:table-cell table:style-name="ce8" office:value-type="string" calcext:value-type="string">
            <text:p>Kashyap Verm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2]+[.D12]+[.E12]" office:value-type="float" office:value="136" calcext:value-type="float">
            <text:p>136</text:p>
          </table:table-cell>
          <table:table-cell table:style-name="ce13" table:formula="of:=AVERAGE([.C12:.E12])" office:value-type="float" office:value="45.3333333333333" calcext:value-type="float">
            <text:p>45.33</text:p>
          </table:table-cell>
          <table:table-cell table:style-name="ce8" table:formula="of:=IF([.H12]&gt;=90;&quot;A+&quot;;IF([.H12]&gt;=80;&quot;A&quot;;IF([.H12]&gt;=60;&quot;B&quot;;IF([.H12]&gt;=33;&quot;C&quot;;&quot;Fail&quot;))))" office:value-type="string" office:string-value="C" calcext:value-type="string">
            <text:p>C</text:p>
          </table:table-cell>
          <table:table-cell table:style-name="ce8" table:formula="of:=IF(AND([.C12]&gt;80;[.D12]&gt;80);&quot;Yes&quot;;&quot;No&quot;)" office:value-type="string" office:string-value="No" calcext:value-type="string">
            <text:p>No</text:p>
          </table:table-cell>
          <table:table-cell table:style-name="ce8" table:formula="of:=LEFT([.B12];FIND(&quot; &quot;;[.B12])-1)" office:value-type="string" office:string-value="Kashyap" calcext:value-type="string">
            <text:p>Kashyap</text:p>
          </table:table-cell>
          <table:table-cell table:style-name="ce8" table:formula="of:=UPPER([.B12])" office:value-type="string" office:string-value="KASHYAP VERMA" calcext:value-type="string">
            <text:p>KASHYAP VERMA</text:p>
          </table:table-cell>
          <table:table-cell table:style-name="ce8" table:formula="of:=LOWER([.B12])" office:value-type="string" office:string-value="kashyap verma" calcext:value-type="string">
            <text:p>kashyap verma</text:p>
          </table:table-cell>
          <table:table-cell table:style-name="ce8" table:formula="of:=VLOOKUP(1011;[.A2:.B21];2;FALSE())" office:value-type="string" office:string-value="Kashyap Verma" calcext:value-type="string">
            <text:p>Kashyap Verma</text:p>
          </table:table-cell>
          <table:table-cell table:number-columns-repeated="16370"/>
        </table:table-row>
        <table:table-row table:style-name="ro1">
          <table:table-cell table:style-name="ce8" office:value-type="float" office:value="1012" calcext:value-type="float">
            <text:p>1012</text:p>
          </table:table-cell>
          <table:table-cell table:style-name="ce8" office:value-type="string" calcext:value-type="string">
            <text:p>Virat Kohli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1" calcext:value-type="float">
            <text:p>61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3]+[.D13]+[.E13]" office:value-type="float" office:value="186" calcext:value-type="float">
            <text:p>186</text:p>
          </table:table-cell>
          <table:table-cell table:style-name="ce13" table:formula="of:=AVERAGE([.C13:.E13])" office:value-type="float" office:value="62" calcext:value-type="float">
            <text:p>62.00</text:p>
          </table:table-cell>
          <table:table-cell table:style-name="ce8" table:formula="of:=IF([.H13]&gt;=90;&quot;A+&quot;;IF([.H13]&gt;=80;&quot;A&quot;;IF([.H13]&gt;=60;&quot;B&quot;;IF([.H13]&gt;=33;&quot;C&quot;;&quot;Fail&quot;))))" office:value-type="string" office:string-value="B" calcext:value-type="string">
            <text:p>B</text:p>
          </table:table-cell>
          <table:table-cell table:style-name="ce8" table:formula="of:=IF(AND([.C13]&gt;80;[.D13]&gt;80);&quot;Yes&quot;;&quot;No&quot;)" office:value-type="string" office:string-value="No" calcext:value-type="string">
            <text:p>No</text:p>
          </table:table-cell>
          <table:table-cell table:style-name="ce8" table:formula="of:=LEFT([.B13];FIND(&quot; &quot;;[.B13])-1)" office:value-type="string" office:string-value="Virat" calcext:value-type="string">
            <text:p>Virat</text:p>
          </table:table-cell>
          <table:table-cell table:style-name="ce8" table:formula="of:=UPPER([.B13])" office:value-type="string" office:string-value="VIRAT KOHLI" calcext:value-type="string">
            <text:p>VIRAT KOHLI</text:p>
          </table:table-cell>
          <table:table-cell table:style-name="ce8" table:formula="of:=LOWER([.B13])" office:value-type="string" office:string-value="virat kohli" calcext:value-type="string">
            <text:p>virat kohli</text:p>
          </table:table-cell>
          <table:table-cell table:style-name="ce8" table:formula="of:=VLOOKUP(1012;[.A2:.B21];2;FALSE())" office:value-type="string" office:string-value="Virat Kohli" calcext:value-type="string">
            <text:p>Virat Kohli</text:p>
          </table:table-cell>
          <table:table-cell table:number-columns-repeated="16370"/>
        </table:table-row>
        <table:table-row table:style-name="ro1">
          <table:table-cell table:style-name="ce8" office:value-type="float" office:value="1013" calcext:value-type="float">
            <text:p>1013</text:p>
          </table:table-cell>
          <table:table-cell table:style-name="ce8" office:value-type="string" calcext:value-type="string">
            <text:p>Mrunal Thakur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8" calcext:value-type="float">
            <text:p>58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4]+[.D14]+[.E14]" office:value-type="float" office:value="203" calcext:value-type="float">
            <text:p>203</text:p>
          </table:table-cell>
          <table:table-cell table:style-name="ce13" table:formula="of:=AVERAGE([.C14:.E14])" office:value-type="float" office:value="67.6666666666667" calcext:value-type="float">
            <text:p>67.67</text:p>
          </table:table-cell>
          <table:table-cell table:style-name="ce8" table:formula="of:=IF([.H14]&gt;=90;&quot;A+&quot;;IF([.H14]&gt;=80;&quot;A&quot;;IF([.H14]&gt;=60;&quot;B&quot;;IF([.H14]&gt;=33;&quot;C&quot;;&quot;Fail&quot;))))" office:value-type="string" office:string-value="B" calcext:value-type="string">
            <text:p>B</text:p>
          </table:table-cell>
          <table:table-cell table:style-name="ce8" table:formula="of:=IF(AND([.C14]&gt;80;[.D14]&gt;80);&quot;Yes&quot;;&quot;No&quot;)" office:value-type="string" office:string-value="No" calcext:value-type="string">
            <text:p>No</text:p>
          </table:table-cell>
          <table:table-cell table:style-name="ce8" table:formula="of:=LEFT([.B14];FIND(&quot; &quot;;[.B14])-1)" office:value-type="string" office:string-value="Mrunal" calcext:value-type="string">
            <text:p>Mrunal</text:p>
          </table:table-cell>
          <table:table-cell table:style-name="ce8" table:formula="of:=UPPER([.B14])" office:value-type="string" office:string-value="MRUNAL THAKUR" calcext:value-type="string">
            <text:p>MRUNAL THAKUR</text:p>
          </table:table-cell>
          <table:table-cell table:style-name="ce8" table:formula="of:=LOWER([.B14])" office:value-type="string" office:string-value="mrunal thakur" calcext:value-type="string">
            <text:p>mrunal thakur</text:p>
          </table:table-cell>
          <table:table-cell table:style-name="ce8" table:formula="of:=VLOOKUP(1013;[.A2:.B21];2;FALSE())" office:value-type="string" office:string-value="Mrunal Thakur" calcext:value-type="string">
            <text:p>Mrunal Thakur</text:p>
          </table:table-cell>
          <table:table-cell table:number-columns-repeated="16370"/>
        </table:table-row>
        <table:table-row table:style-name="ro1">
          <table:table-cell table:style-name="ce8" office:value-type="float" office:value="1014" calcext:value-type="float">
            <text:p>1014</text:p>
          </table:table-cell>
          <table:table-cell table:style-name="ce8" office:value-type="string" calcext:value-type="string">
            <text:p>Sadgi Pandey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5" calcext:value-type="float">
            <text:p>55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5]+[.D15]+[.E15]" office:value-type="float" office:value="207" calcext:value-type="float">
            <text:p>207</text:p>
          </table:table-cell>
          <table:table-cell table:style-name="ce13" table:formula="of:=AVERAGE([.C15:.E15])" office:value-type="float" office:value="69" calcext:value-type="float">
            <text:p>69.00</text:p>
          </table:table-cell>
          <table:table-cell table:style-name="ce8" table:formula="of:=IF([.H15]&gt;=90;&quot;A+&quot;;IF([.H15]&gt;=80;&quot;A&quot;;IF([.H15]&gt;=60;&quot;B&quot;;IF([.H15]&gt;=33;&quot;C&quot;;&quot;Fail&quot;))))" office:value-type="string" office:string-value="B" calcext:value-type="string">
            <text:p>B</text:p>
          </table:table-cell>
          <table:table-cell table:style-name="ce8" table:formula="of:=IF(AND([.C15]&gt;80;[.D15]&gt;80);&quot;Yes&quot;;&quot;No&quot;)" office:value-type="string" office:string-value="No" calcext:value-type="string">
            <text:p>No</text:p>
          </table:table-cell>
          <table:table-cell table:style-name="ce8" table:formula="of:=LEFT([.B15];FIND(&quot; &quot;;[.B15])-1)" office:value-type="string" office:string-value="Sadgi" calcext:value-type="string">
            <text:p>Sadgi</text:p>
          </table:table-cell>
          <table:table-cell table:style-name="ce8" table:formula="of:=UPPER([.B15])" office:value-type="string" office:string-value="SADGI PANDEY" calcext:value-type="string">
            <text:p>SADGI PANDEY</text:p>
          </table:table-cell>
          <table:table-cell table:style-name="ce8" table:formula="of:=LOWER([.B15])" office:value-type="string" office:string-value="sadgi pandey" calcext:value-type="string">
            <text:p>sadgi pandey</text:p>
          </table:table-cell>
          <table:table-cell table:style-name="ce8" table:formula="of:=VLOOKUP(1014;[.A2:.B21];2;FALSE())" office:value-type="string" office:string-value="Sadgi Pandey" calcext:value-type="string">
            <text:p>Sadgi Pandey</text:p>
          </table:table-cell>
          <table:table-cell table:number-columns-repeated="16370"/>
        </table:table-row>
        <table:table-row table:style-name="ro1">
          <table:table-cell table:style-name="ce8" office:value-type="float" office:value="1015" calcext:value-type="float">
            <text:p>1015</text:p>
          </table:table-cell>
          <table:table-cell table:style-name="ce8" office:value-type="string" calcext:value-type="string">
            <text:p>Aarav Pandey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9" calcext:value-type="float">
            <text:p>59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6]+[.D16]+[.E16]" office:value-type="float" office:value="164" calcext:value-type="float">
            <text:p>164</text:p>
          </table:table-cell>
          <table:table-cell table:style-name="ce13" table:formula="of:=AVERAGE([.C16:.E16])" office:value-type="float" office:value="54.6666666666667" calcext:value-type="float">
            <text:p>54.67</text:p>
          </table:table-cell>
          <table:table-cell table:style-name="ce8" table:formula="of:=IF([.H16]&gt;=90;&quot;A+&quot;;IF([.H16]&gt;=80;&quot;A&quot;;IF([.H16]&gt;=60;&quot;B&quot;;IF([.H16]&gt;=33;&quot;C&quot;;&quot;Fail&quot;))))" office:value-type="string" office:string-value="C" calcext:value-type="string">
            <text:p>C</text:p>
          </table:table-cell>
          <table:table-cell table:style-name="ce8" table:formula="of:=IF(AND([.C16]&gt;80;[.D16]&gt;80);&quot;Yes&quot;;&quot;No&quot;)" office:value-type="string" office:string-value="No" calcext:value-type="string">
            <text:p>No</text:p>
          </table:table-cell>
          <table:table-cell table:style-name="ce8" table:formula="of:=LEFT([.B16];FIND(&quot; &quot;;[.B16])-1)" office:value-type="string" office:string-value="Aarav" calcext:value-type="string">
            <text:p>Aarav</text:p>
          </table:table-cell>
          <table:table-cell table:style-name="ce8" table:formula="of:=UPPER([.B16])" office:value-type="string" office:string-value="AARAV PANDEY" calcext:value-type="string">
            <text:p>AARAV PANDEY</text:p>
          </table:table-cell>
          <table:table-cell table:style-name="ce8" table:formula="of:=LOWER([.B16])" office:value-type="string" office:string-value="aarav pandey" calcext:value-type="string">
            <text:p>aarav pandey</text:p>
          </table:table-cell>
          <table:table-cell table:style-name="ce8" table:formula="of:=VLOOKUP(1015;[.A2:.B21];2;FALSE())" office:value-type="string" office:string-value="Aarav Pandey" calcext:value-type="string">
            <text:p>Aarav Pandey</text:p>
          </table:table-cell>
          <table:table-cell table:number-columns-repeated="16370"/>
        </table:table-row>
        <table:table-row table:style-name="ro1">
          <table:table-cell table:style-name="ce8" office:value-type="float" office:value="1016" calcext:value-type="float">
            <text:p>1016</text:p>
          </table:table-cell>
          <table:table-cell table:style-name="ce8" office:value-type="string" calcext:value-type="string">
            <text:p>Dhaval Prajapati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7]+[.D17]+[.E17]" office:value-type="float" office:value="273" calcext:value-type="float">
            <text:p>273</text:p>
          </table:table-cell>
          <table:table-cell table:style-name="ce13" table:formula="of:=AVERAGE([.C17:.E17])" office:value-type="float" office:value="91" calcext:value-type="float">
            <text:p>91.00</text:p>
          </table:table-cell>
          <table:table-cell table:style-name="ce8" table:formula="of:=IF([.H17]&gt;=90;&quot;A+&quot;;IF([.H17]&gt;=80;&quot;A&quot;;IF([.H17]&gt;=60;&quot;B&quot;;IF([.H17]&gt;=33;&quot;C&quot;;&quot;Fail&quot;))))" office:value-type="string" office:string-value="A+" calcext:value-type="string">
            <text:p>A+</text:p>
          </table:table-cell>
          <table:table-cell table:style-name="ce8" table:formula="of:=IF(AND([.C17]&gt;80;[.D17]&gt;80);&quot;Yes&quot;;&quot;No&quot;)" office:value-type="string" office:string-value="Yes" calcext:value-type="string">
            <text:p>Yes</text:p>
          </table:table-cell>
          <table:table-cell table:style-name="ce8" table:formula="of:=LEFT([.B17];FIND(&quot; &quot;;[.B17])-1)" office:value-type="string" office:string-value="Dhaval" calcext:value-type="string">
            <text:p>Dhaval</text:p>
          </table:table-cell>
          <table:table-cell table:style-name="ce8" table:formula="of:=UPPER([.B17])" office:value-type="string" office:string-value="DHAVAL PRAJAPATI" calcext:value-type="string">
            <text:p>DHAVAL PRAJAPATI</text:p>
          </table:table-cell>
          <table:table-cell table:style-name="ce8" table:formula="of:=LOWER([.B17])" office:value-type="string" office:string-value="dhaval prajapati" calcext:value-type="string">
            <text:p>dhaval prajapati</text:p>
          </table:table-cell>
          <table:table-cell table:style-name="ce8" table:formula="of:=VLOOKUP(1016;[.A2:.B21];2;FALSE())" office:value-type="string" office:string-value="Dhaval Prajapati" calcext:value-type="string">
            <text:p>Dhaval Prajapati</text:p>
          </table:table-cell>
          <table:table-cell table:number-columns-repeated="16370"/>
        </table:table-row>
        <table:table-row table:style-name="ro1">
          <table:table-cell table:style-name="ce8" office:value-type="float" office:value="1017" calcext:value-type="float">
            <text:p>1017</text:p>
          </table:table-cell>
          <table:table-cell table:style-name="ce8" office:value-type="string" calcext:value-type="string">
            <text:p>Yogesh Prajapati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86" calcext:value-type="float">
            <text:p>86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8]+[.D18]+[.E18]" office:value-type="float" office:value="230" calcext:value-type="float">
            <text:p>230</text:p>
          </table:table-cell>
          <table:table-cell table:style-name="ce13" table:formula="of:=AVERAGE([.C18:.E18])" office:value-type="float" office:value="76.6666666666667" calcext:value-type="float">
            <text:p>76.67</text:p>
          </table:table-cell>
          <table:table-cell table:style-name="ce8" table:formula="of:=IF([.H18]&gt;=90;&quot;A+&quot;;IF([.H18]&gt;=80;&quot;A&quot;;IF([.H18]&gt;=60;&quot;B&quot;;IF([.H18]&gt;=33;&quot;C&quot;;&quot;Fail&quot;))))" office:value-type="string" office:string-value="B" calcext:value-type="string">
            <text:p>B</text:p>
          </table:table-cell>
          <table:table-cell table:style-name="ce8" table:formula="of:=IF(AND([.C18]&gt;80;[.D18]&gt;80);&quot;Yes&quot;;&quot;No&quot;)" office:value-type="string" office:string-value="No" calcext:value-type="string">
            <text:p>No</text:p>
          </table:table-cell>
          <table:table-cell table:style-name="ce8" table:formula="of:=LEFT([.B18];FIND(&quot; &quot;;[.B18])-1)" office:value-type="string" office:string-value="Yogesh" calcext:value-type="string">
            <text:p>Yogesh</text:p>
          </table:table-cell>
          <table:table-cell table:style-name="ce8" table:formula="of:=UPPER([.B18])" office:value-type="string" office:string-value="YOGESH PRAJAPATI" calcext:value-type="string">
            <text:p>YOGESH PRAJAPATI</text:p>
          </table:table-cell>
          <table:table-cell table:style-name="ce8" table:formula="of:=LOWER([.B18])" office:value-type="string" office:string-value="yogesh prajapati" calcext:value-type="string">
            <text:p>yogesh prajapati</text:p>
          </table:table-cell>
          <table:table-cell table:style-name="ce8" table:formula="of:=VLOOKUP(1017;[.A2:.B21];2;FALSE())" office:value-type="string" office:string-value="Yogesh Prajapati" calcext:value-type="string">
            <text:p>Yogesh Prajapati</text:p>
          </table:table-cell>
          <table:table-cell table:number-columns-repeated="16370"/>
        </table:table-row>
        <table:table-row table:style-name="ro1">
          <table:table-cell table:style-name="ce8" office:value-type="float" office:value="1018" calcext:value-type="float">
            <text:p>1018</text:p>
          </table:table-cell>
          <table:table-cell table:style-name="ce8" office:value-type="string" calcext:value-type="string">
            <text:p>Mahesh Chaubey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19]+[.D19]+[.E19]" office:value-type="float" office:value="190" calcext:value-type="float">
            <text:p>190</text:p>
          </table:table-cell>
          <table:table-cell table:style-name="ce13" table:formula="of:=AVERAGE([.C19:.E19])" office:value-type="float" office:value="63.3333333333333" calcext:value-type="float">
            <text:p>63.33</text:p>
          </table:table-cell>
          <table:table-cell table:style-name="ce8" table:formula="of:=IF([.H19]&gt;=90;&quot;A+&quot;;IF([.H19]&gt;=80;&quot;A&quot;;IF([.H19]&gt;=60;&quot;B&quot;;IF([.H19]&gt;=33;&quot;C&quot;;&quot;Fail&quot;))))" office:value-type="string" office:string-value="B" calcext:value-type="string">
            <text:p>B</text:p>
          </table:table-cell>
          <table:table-cell table:style-name="ce8" table:formula="of:=IF(AND([.C19]&gt;80;[.D19]&gt;80);&quot;Yes&quot;;&quot;No&quot;)" office:value-type="string" office:string-value="No" calcext:value-type="string">
            <text:p>No</text:p>
          </table:table-cell>
          <table:table-cell table:style-name="ce8" table:formula="of:=LEFT([.B19];FIND(&quot; &quot;;[.B19])-1)" office:value-type="string" office:string-value="Mahesh" calcext:value-type="string">
            <text:p>Mahesh</text:p>
          </table:table-cell>
          <table:table-cell table:style-name="ce8" table:formula="of:=UPPER([.B19])" office:value-type="string" office:string-value="MAHESH CHAUBEY" calcext:value-type="string">
            <text:p>MAHESH CHAUBEY</text:p>
          </table:table-cell>
          <table:table-cell table:style-name="ce8" table:formula="of:=LOWER([.B19])" office:value-type="string" office:string-value="mahesh chaubey" calcext:value-type="string">
            <text:p>mahesh chaubey</text:p>
          </table:table-cell>
          <table:table-cell table:style-name="ce8" table:formula="of:=VLOOKUP(1018;[.A2:.B21];2;FALSE())" office:value-type="string" office:string-value="Mahesh Chaubey" calcext:value-type="string">
            <text:p>Mahesh Chaubey</text:p>
          </table:table-cell>
          <table:table-cell table:number-columns-repeated="16370"/>
        </table:table-row>
        <table:table-row table:style-name="ro1">
          <table:table-cell table:style-name="ce8" office:value-type="float" office:value="1019" calcext:value-type="float">
            <text:p>1019</text:p>
          </table:table-cell>
          <table:table-cell table:style-name="ce8" office:value-type="string" calcext:value-type="string">
            <text:p>Sarish kharwar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20]+[.D20]+[.E20]" office:value-type="float" office:value="163" calcext:value-type="float">
            <text:p>163</text:p>
          </table:table-cell>
          <table:table-cell table:style-name="ce13" table:formula="of:=AVERAGE([.C20:.E20])" office:value-type="float" office:value="54.3333333333333" calcext:value-type="float">
            <text:p>54.33</text:p>
          </table:table-cell>
          <table:table-cell table:style-name="ce8" table:formula="of:=IF([.H20]&gt;=90;&quot;A+&quot;;IF([.H20]&gt;=80;&quot;A&quot;;IF([.H20]&gt;=60;&quot;B&quot;;IF([.H20]&gt;=33;&quot;C&quot;;&quot;Fail&quot;))))" office:value-type="string" office:string-value="C" calcext:value-type="string">
            <text:p>C</text:p>
          </table:table-cell>
          <table:table-cell table:style-name="ce8" table:formula="of:=IF(AND([.C20]&gt;80;[.D20]&gt;80);&quot;Yes&quot;;&quot;No&quot;)" office:value-type="string" office:string-value="No" calcext:value-type="string">
            <text:p>No</text:p>
          </table:table-cell>
          <table:table-cell table:style-name="ce8" table:formula="of:=LEFT([.B20];FIND(&quot; &quot;;[.B20])-1)" office:value-type="string" office:string-value="Sarish" calcext:value-type="string">
            <text:p>Sarish</text:p>
          </table:table-cell>
          <table:table-cell table:style-name="ce8" table:formula="of:=UPPER([.B20])" office:value-type="string" office:string-value="SARISH KHARWAR" calcext:value-type="string">
            <text:p>SARISH KHARWAR</text:p>
          </table:table-cell>
          <table:table-cell table:style-name="ce8" table:formula="of:=LOWER([.B20])" office:value-type="string" office:string-value="sarish kharwar" calcext:value-type="string">
            <text:p>sarish kharwar</text:p>
          </table:table-cell>
          <table:table-cell table:style-name="ce8" table:formula="of:=VLOOKUP(1019;[.A2:.B21];2;FALSE())" office:value-type="string" office:string-value="Sarish kharwar" calcext:value-type="string">
            <text:p>Sarish kharwar</text:p>
          </table:table-cell>
          <table:table-cell table:number-columns-repeated="16370"/>
        </table:table-row>
        <table:table-row table:style-name="ro1">
          <table:table-cell table:style-name="ce8" office:value-type="float" office:value="1020" calcext:value-type="float">
            <text:p>1020</text:p>
          </table:table-cell>
          <table:table-cell table:style-name="ce8" office:value-type="string" calcext:value-type="string">
            <text:p>Sarvesh Mishr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date" office:date-value="2026-05-27" calcext:value-type="date">
            <text:p>27/05/2026</text:p>
          </table:table-cell>
          <table:table-cell table:style-name="ce8" table:formula="of:=[.C21]+[.D21]+[.E21]" office:value-type="float" office:value="154" calcext:value-type="float">
            <text:p>154</text:p>
          </table:table-cell>
          <table:table-cell table:style-name="ce13" table:formula="of:=AVERAGE([.C21:.E21])" office:value-type="float" office:value="51.3333333333333" calcext:value-type="float">
            <text:p>51.33</text:p>
          </table:table-cell>
          <table:table-cell table:style-name="ce8" table:formula="of:=IF([.H21]&gt;=90;&quot;A+&quot;;IF([.H21]&gt;=80;&quot;A&quot;;IF([.H21]&gt;=60;&quot;B&quot;;IF([.H21]&gt;=33;&quot;C&quot;;&quot;Fail&quot;))))" office:value-type="string" office:string-value="C" calcext:value-type="string">
            <text:p>C</text:p>
          </table:table-cell>
          <table:table-cell table:style-name="ce8" table:formula="of:=IF(AND([.C21]&gt;80;[.D21]&gt;80);&quot;Yes&quot;;&quot;No&quot;)" office:value-type="string" office:string-value="No" calcext:value-type="string">
            <text:p>No</text:p>
          </table:table-cell>
          <table:table-cell table:style-name="ce8" table:formula="of:=LEFT([.B21];FIND(&quot; &quot;;[.B21])-1)" office:value-type="string" office:string-value="Sarvesh" calcext:value-type="string">
            <text:p>Sarvesh</text:p>
          </table:table-cell>
          <table:table-cell table:style-name="ce8" table:formula="of:=UPPER([.B21])" office:value-type="string" office:string-value="SARVESH MISHRA" calcext:value-type="string">
            <text:p>SARVESH MISHRA</text:p>
          </table:table-cell>
          <table:table-cell table:style-name="ce8" table:formula="of:=LOWER([.B21])" office:value-type="string" office:string-value="sarvesh mishra" calcext:value-type="string">
            <text:p>sarvesh mishra</text:p>
          </table:table-cell>
          <table:table-cell table:style-name="ce8" table:formula="of:=VLOOKUP(1020;[.A2:.B21];2;FALSE())" office:value-type="string" office:string-value="Sarvesh Mishra" calcext:value-type="string">
            <text:p>Sarvesh Mishra</text:p>
          </table:table-cell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9" table:number-rows-spanned="1">
            <text:p>Top <text:s/>Student's</text:p>
          </table:table-cell>
          <table:covered-table-cell table:number-columns-repeated="8" table:style-name="ce10"/>
          <table:table-cell table:number-columns-repeated="3"/>
          <table:table-cell table:style-name="ce14" office:value-type="string" calcext:value-type="string">
            <text:p>Students Above 50 in Maths</text:p>
          </table:table-cell>
          <table:table-cell table:number-columns-repeated="16371"/>
        </table:table-row>
        <table:table-row table:style-name="ro1">
          <table:table-cell table:style-name="ce11" table:number-matrix-columns-spanned="9" table:number-matrix-rows-spanned="8" table:formula="of:=_xlfn.vstack([.A1:.I1];_xlfn._xlws.filter([.A2:.I21];[.H2:.H21]&gt;80))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style-name="ce11" office:value-type="string" office:string-value="" calcext:value-type="error">
            <text:p>#NAME?</text:p>
          </table:table-cell>
          <table:table-cell table:number-columns-repeated="3"/>
          <table:table-cell table:style-name="ce8" table:formula="of:=COUNTIFS([.C2:.C21];&quot;&gt;50&quot;)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style-name="ce8" office:value-type="string" office:string-value="" calcext:value-type="error">
            <text:p>#NAME?</text:p>
          </table:table-cell>
          <table:table-cell table:number-columns-repeated="16375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les" table:style-name="ta3">
        <table:table-column table:style-name="co2" table:number-columns-repeated="3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" table:number-columns-repeated="16372" table:default-cell-style-name="Default"/>
        <table:table-row table:style-name="ro1">
          <table:table-cell table:style-name="ce15" office:value-type="string" calcext:value-type="string">
            <text:p>Sales ID</text:p>
          </table:table-cell>
          <table:table-cell table:style-name="ce15" office:value-type="string" calcext:value-type="string">
            <text:p>Product</text:p>
          </table:table-cell>
          <table:table-cell table:style-name="ce15" office:value-type="string" calcext:value-type="string">
            <text:p>Region</text:p>
          </table:table-cell>
          <table:table-cell table:style-name="ce15" office:value-type="string" calcext:value-type="string">
            <text:p>Salesperson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>
            <text:p>Date</text:p>
          </table:table-cell>
          <table:table-cell table:style-name="ce7" office:value-type="string" calcext:value-type="string">
            <text:p>INDEX+MATCH(Salesperson Sales)</text:p>
          </table:table-cell>
          <table:table-cell table:number-columns-repeated="16377"/>
        </table:table-row>
        <table:table-row table:style-name="ro1">
          <table:table-cell table:style-name="ce8" office:value-type="float" office:value="2001" calcext:value-type="float">
            <text:p>2001</text:p>
          </table:table-cell>
          <table:table-cell table:style-name="ce8" office:value-type="string" calcext:value-type="string">
            <text:p>Keyboard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Anuradha Prajapati</text:p>
          </table:table-cell>
          <table:table-cell table:style-name="ce8" office:value-type="float" office:value="900" calcext:value-type="float">
            <text:p>900</text:p>
          </table:table-cell>
          <table:table-cell table:style-name="ce12" office:value-type="date" office:date-value="2026-01-01" calcext:value-type="date">
            <text:p>01/01/2026</text:p>
          </table:table-cell>
          <table:table-cell table:style-name="ce8" table:number-matrix-columns-spanned="1" table:number-matrix-rows-spanned="1" table:formula="of:=INDEX([.E2:.E21];MATCH(1;([.D2:.D21]=&quot;Anuradha Prajapati&quot;)*(MONTH([.F2:.F21])=1);0))" office:value-type="float" office:value="900" calcext:value-type="float">
            <text:p>900</text:p>
          </table:table-cell>
          <table:table-cell table:number-columns-repeated="16377"/>
        </table:table-row>
        <table:table-row table:style-name="ro1">
          <table:table-cell table:style-name="ce8" office:value-type="float" office:value="2002" calcext:value-type="float">
            <text:p>2002</text:p>
          </table:table-cell>
          <table:table-cell table:style-name="ce8" office:value-type="string" calcext:value-type="string">
            <text:p>Mouse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Yashraj Sharma</text:p>
          </table:table-cell>
          <table:table-cell table:style-name="ce8" office:value-type="float" office:value="800" calcext:value-type="float">
            <text:p>800</text:p>
          </table:table-cell>
          <table:table-cell table:style-name="ce12" office:value-type="date" office:date-value="2026-01-12" calcext:value-type="date">
            <text:p>12/01/2026</text:p>
          </table:table-cell>
          <table:table-cell table:style-name="ce8" table:number-matrix-columns-spanned="1" table:number-matrix-rows-spanned="1" table:formula="of:=INDEX([.E3:.E22];MATCH(1;([.D3:.D22]=&quot;Yashraj Sharma&quot;)*(MONTH([.F3:.F22])=1);0))" office:value-type="float" office:value="800" calcext:value-type="float">
            <text:p>800</text:p>
          </table:table-cell>
          <table:table-cell table:number-columns-repeated="2"/>
          <table:table-cell table:style-name="ce7" office:value-type="string" calcext:value-type="string">
            <text:p>SUMIFS(Keyboard Sales in South)</text:p>
          </table:table-cell>
          <table:table-cell/>
          <table:table-cell table:style-name="ce7" office:value-type="string" calcext:value-type="string">
            <text:p>VLOOKUP(Mouse Price Search)</text:p>
          </table:table-cell>
          <table:table-cell table:number-columns-repeated="16372"/>
        </table:table-row>
        <table:table-row table:style-name="ro1">
          <table:table-cell table:style-name="ce8" office:value-type="float" office:value="2003" calcext:value-type="float">
            <text:p>2003</text:p>
          </table:table-cell>
          <table:table-cell table:style-name="ce8" office:value-type="string" calcext:value-type="string">
            <text:p>Printer </text:p>
          </table:table-cell>
          <table:table-cell table:style-name="ce8" office:value-type="string" calcext:value-type="string">
            <text:p>North</text:p>
          </table:table-cell>
          <table:table-cell table:style-name="ce8" office:value-type="string" calcext:value-type="string">
            <text:p>Punit Mishra</text:p>
          </table:table-cell>
          <table:table-cell table:style-name="ce8" office:value-type="float" office:value="5000" calcext:value-type="float">
            <text:p>5000</text:p>
          </table:table-cell>
          <table:table-cell table:style-name="ce12" office:value-type="date" office:date-value="2026-02-03" calcext:value-type="date">
            <text:p>03/02/2026</text:p>
          </table:table-cell>
          <table:table-cell table:style-name="ce8" table:number-matrix-columns-spanned="1" table:number-matrix-rows-spanned="1" table:formula="of:=INDEX([.E4:.E23];MATCH(1;([.D4:.D23]=&quot;Punit Mishra&quot;)*(MONTH([.F4:.F23])=2);0))" office:value-type="float" office:value="5000" calcext:value-type="float">
            <text:p>5000</text:p>
          </table:table-cell>
          <table:table-cell table:number-columns-repeated="2"/>
          <table:table-cell table:style-name="ce8" table:formula="of:=SUMIFS([.E2:.E21];[.B2:.B21];&quot;Keyboard&quot;;[.C2:.C21];&quot;South&quot;)" office:value-type="float" office:value="1800" calcext:value-type="float">
            <text:p>1800</text:p>
          </table:table-cell>
          <table:table-cell/>
          <table:table-cell table:style-name="ce8" table:formula="of:=VLOOKUP(&quot;Mouse&quot;;[.B2:.E21];4;FALSE())" office:value-type="float" office:value="800" calcext:value-type="float">
            <text:p>800</text:p>
          </table:table-cell>
          <table:table-cell table:number-columns-repeated="16372"/>
        </table:table-row>
        <table:table-row table:style-name="ro1">
          <table:table-cell table:style-name="ce8" office:value-type="float" office:value="2004" calcext:value-type="float">
            <text:p>2004</text:p>
          </table:table-cell>
          <table:table-cell table:style-name="ce8" office:value-type="string" calcext:value-type="string">
            <text:p>Printer 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Amit Maharana</text:p>
          </table:table-cell>
          <table:table-cell table:style-name="ce8" office:value-type="float" office:value="7000" calcext:value-type="float">
            <text:p>7000</text:p>
          </table:table-cell>
          <table:table-cell table:style-name="ce12" office:value-type="date" office:date-value="2026-01-04" calcext:value-type="date">
            <text:p>04/01/2026</text:p>
          </table:table-cell>
          <table:table-cell table:style-name="ce8" table:number-matrix-columns-spanned="1" table:number-matrix-rows-spanned="1" table:formula="of:=INDEX([.E5:.E24];MATCH(1;([.D5:.D24]=&quot;Amit Maharana&quot;)*(MONTH([.F5:.F24])=1);0))" office:value-type="float" office:value="7000" calcext:value-type="float">
            <text:p>7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 table:style-name="ce8" office:value-type="string" calcext:value-type="string">
            <text:p>Laptop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Abhiraj Sharma</text:p>
          </table:table-cell>
          <table:table-cell table:style-name="ce8" office:value-type="float" office:value="80000" calcext:value-type="float">
            <text:p>80000</text:p>
          </table:table-cell>
          <table:table-cell table:style-name="ce12" office:value-type="date" office:date-value="2026-01-05" calcext:value-type="date">
            <text:p>05/01/2026</text:p>
          </table:table-cell>
          <table:table-cell table:style-name="ce8" table:number-matrix-columns-spanned="1" table:number-matrix-rows-spanned="1" table:formula="of:=INDEX([.E6:.E25];MATCH(1;([.D6:.D25]=&quot;Abhiraj Sharma&quot;)*(MONTH([.F6:.F25])=1);0))" office:value-type="float" office:value="80000" calcext:value-type="float">
            <text:p>80000</text:p>
          </table:table-cell>
          <table:table-cell table:number-columns-repeated="2"/>
          <table:table-cell table:style-name="ce7" office:value-type="string" calcext:value-type="string">
            <text:p>COUNTIFS(Count Keyboard sales)</text:p>
          </table:table-cell>
          <table:table-cell/>
          <table:table-cell table:style-name="ce7" office:value-type="string" calcext:value-type="string">
            <text:p>XMATCH</text:p>
          </table:table-cell>
          <table:table-cell table:number-columns-repeated="16372"/>
        </table:table-row>
        <table:table-row table:style-name="ro1">
          <table:table-cell table:style-name="ce8" office:value-type="float" office:value="2006" calcext:value-type="float">
            <text:p>2006</text:p>
          </table:table-cell>
          <table:table-cell table:style-name="ce8" office:value-type="string" calcext:value-type="string">
            <text:p>Monitor</text:p>
          </table:table-cell>
          <table:table-cell table:style-name="ce8" office:value-type="string" calcext:value-type="string">
            <text:p>East</text:p>
          </table:table-cell>
          <table:table-cell table:style-name="ce8" office:value-type="string" calcext:value-type="string">
            <text:p>Vaibhavraj Sharma</text:p>
          </table:table-cell>
          <table:table-cell table:style-name="ce8" office:value-type="float" office:value="500" calcext:value-type="float">
            <text:p>500</text:p>
          </table:table-cell>
          <table:table-cell table:style-name="ce12" office:value-type="date" office:date-value="2026-01-24" calcext:value-type="date">
            <text:p>24/01/2026</text:p>
          </table:table-cell>
          <table:table-cell table:style-name="ce8" table:number-matrix-columns-spanned="1" table:number-matrix-rows-spanned="1" table:formula="of:=INDEX([.E7:.E26];MATCH(1;([.D7:.D26]=&quot;Vaibhavraj Sharma&quot;)*(MONTH([.F7:.F26])=1);0))" office:value-type="float" office:value="500" calcext:value-type="float">
            <text:p>500</text:p>
          </table:table-cell>
          <table:table-cell table:number-columns-repeated="2"/>
          <table:table-cell table:style-name="ce8" table:formula="of:=COUNTIFS([.B2:.B21];&quot;Keyboard&quot;)" office:value-type="float" office:value="3" calcext:value-type="float">
            <text:p>3</text:p>
          </table:table-cell>
          <table:table-cell/>
          <table:table-cell table:style-name="ce8" table:formula="of:=_xlfn.xmatch(&quot;Laptop&quot;;[.B2:.B21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8" office:value-type="float" office:value="2007" calcext:value-type="float">
            <text:p>2007</text:p>
          </table:table-cell>
          <table:table-cell table:style-name="ce8" office:value-type="string" calcext:value-type="string">
            <text:p>Mouse</text:p>
          </table:table-cell>
          <table:table-cell table:style-name="ce8" office:value-type="string" calcext:value-type="string">
            <text:p>North</text:p>
          </table:table-cell>
          <table:table-cell table:style-name="ce8" office:value-type="string" calcext:value-type="string">
            <text:p>Sugam Pradhan</text:p>
          </table:table-cell>
          <table:table-cell table:style-name="ce8" office:value-type="float" office:value="900" calcext:value-type="float">
            <text:p>900</text:p>
          </table:table-cell>
          <table:table-cell table:style-name="ce12" office:value-type="date" office:date-value="2026-01-27" calcext:value-type="date">
            <text:p>27/01/2026</text:p>
          </table:table-cell>
          <table:table-cell table:style-name="ce8" table:number-matrix-columns-spanned="1" table:number-matrix-rows-spanned="1" table:formula="of:=INDEX([.E8:.E27];MATCH(1;([.D8:.D27]=&quot;Sugam Pradhan&quot;)*(MONTH([.F8:.F27])=1);0))" office:value-type="float" office:value="900" calcext:value-type="float">
            <text:p>900</text:p>
          </table:table-cell>
          <table:table-cell table:number-columns-repeated="16377"/>
        </table:table-row>
        <table:table-row table:style-name="ro1">
          <table:table-cell table:style-name="ce8" office:value-type="float" office:value="2008" calcext:value-type="float">
            <text:p>2008</text:p>
          </table:table-cell>
          <table:table-cell table:style-name="ce8" office:value-type="string" calcext:value-type="string">
            <text:p>Keyboard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Prabhat Pandey</text:p>
          </table:table-cell>
          <table:table-cell table:style-name="ce8" office:value-type="float" office:value="900" calcext:value-type="float">
            <text:p>900</text:p>
          </table:table-cell>
          <table:table-cell table:style-name="ce12" office:value-type="date" office:date-value="2026-01-18" calcext:value-type="date">
            <text:p>18/01/2026</text:p>
          </table:table-cell>
          <table:table-cell table:style-name="ce8" table:number-matrix-columns-spanned="1" table:number-matrix-rows-spanned="1" table:formula="of:=INDEX([.E9:.E28];MATCH(1;([.D9:.D28]=&quot;Prabhat Pandey&quot;)*(MONTH([.F9:.F28])=1);0))" office:value-type="float" office:value="900" calcext:value-type="float">
            <text:p>900</text:p>
          </table:table-cell>
          <table:table-cell table:number-columns-repeated="2"/>
          <table:table-cell table:style-name="ce7" office:value-type="string" calcext:value-type="string">
            <text:p>XLOOKUP(Salesperson Performance)</text:p>
          </table:table-cell>
          <table:table-cell/>
          <table:table-cell table:style-name="ce7" office:value-type="string" calcext:value-type="string">
            <text:p>OFFSET Function</text:p>
          </table:table-cell>
          <table:table-cell table:number-columns-repeated="16372"/>
        </table:table-row>
        <table:table-row table:style-name="ro1">
          <table:table-cell table:style-name="ce8" office:value-type="float" office:value="2009" calcext:value-type="float">
            <text:p>2009</text:p>
          </table:table-cell>
          <table:table-cell table:style-name="ce8" office:value-type="string" calcext:value-type="string">
            <text:p>Mouse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Deepak Paswan</text:p>
          </table:table-cell>
          <table:table-cell table:style-name="ce8" office:value-type="float" office:value="750" calcext:value-type="float">
            <text:p>750</text:p>
          </table:table-cell>
          <table:table-cell table:style-name="ce12" office:value-type="date" office:date-value="2026-01-19" calcext:value-type="date">
            <text:p>19/01/2026</text:p>
          </table:table-cell>
          <table:table-cell table:style-name="ce8" table:number-matrix-columns-spanned="1" table:number-matrix-rows-spanned="1" table:formula="of:=INDEX([.E10:.E29];MATCH(1;([.D10:.D29]=&quot;Deepak Paswan&quot;)*(MONTH([.F10:.F29])=1);0))" office:value-type="float" office:value="750" calcext:value-type="float">
            <text:p>750</text:p>
          </table:table-cell>
          <table:table-cell table:number-columns-repeated="2"/>
          <table:table-cell table:style-name="ce8" table:formula="of:=_xlfn.xlookup(&quot;Anuradha Prajapati&quot;;[.D2:.D21];[.E2:.E21])" office:value-type="float" office:value="900" calcext:value-type="float">
            <text:p>900</text:p>
          </table:table-cell>
          <table:table-cell/>
          <table:table-cell table:style-name="ce8" table:formula="of:=SUM(OFFSET([.E2];0;0;5;1))" office:value-type="float" office:value="93700" calcext:value-type="float">
            <text:p>93700</text:p>
          </table:table-cell>
          <table:table-cell table:number-columns-repeated="16372"/>
        </table:table-row>
        <table:table-row table:style-name="ro1">
          <table:table-cell table:style-name="ce8" office:value-type="float" office:value="2010" calcext:value-type="float">
            <text:p>2010</text:p>
          </table:table-cell>
          <table:table-cell table:style-name="ce8" office:value-type="string" calcext:value-type="string">
            <text:p>Laptop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Keshav Singh</text:p>
          </table:table-cell>
          <table:table-cell table:style-name="ce8" office:value-type="float" office:value="80000" calcext:value-type="float">
            <text:p>80000</text:p>
          </table:table-cell>
          <table:table-cell table:style-name="ce12" office:value-type="date" office:date-value="2026-01-10" calcext:value-type="date">
            <text:p>10/01/2026</text:p>
          </table:table-cell>
          <table:table-cell table:style-name="ce8" table:number-matrix-columns-spanned="1" table:number-matrix-rows-spanned="1" table:formula="of:=INDEX([.E11:.E30];MATCH(1;([.D11:.D30]=&quot;Keshav Singh&quot;)*(MONTH([.F11:.F30])=1);0))" office:value-type="float" office:value="80000" calcext:value-type="float">
            <text:p>80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Printer </text:p>
          </table:table-cell>
          <table:table-cell table:style-name="ce8" office:value-type="string" calcext:value-type="string">
            <text:p>East</text:p>
          </table:table-cell>
          <table:table-cell table:style-name="ce8" office:value-type="string" calcext:value-type="string">
            <text:p>Kashyap Verma</text:p>
          </table:table-cell>
          <table:table-cell table:style-name="ce8" office:value-type="float" office:value="8000" calcext:value-type="float">
            <text:p>8000</text:p>
          </table:table-cell>
          <table:table-cell table:style-name="ce12" office:value-type="date" office:date-value="2026-01-11" calcext:value-type="date">
            <text:p>11/01/2026</text:p>
          </table:table-cell>
          <table:table-cell table:style-name="ce8" table:number-matrix-columns-spanned="1" table:number-matrix-rows-spanned="1" table:formula="of:=INDEX([.E12:.E31];MATCH(1;([.D12:.D31]=&quot;Kashyap Verma&quot;)*(MONTH([.F12:.F31])=1);0))" office:value-type="float" office:value="8000" calcext:value-type="float">
            <text:p>8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Laptop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Virat Kohli</text:p>
          </table:table-cell>
          <table:table-cell table:style-name="ce8" office:value-type="float" office:value="90000" calcext:value-type="float">
            <text:p>90000</text:p>
          </table:table-cell>
          <table:table-cell table:style-name="ce12" office:value-type="date" office:date-value="2026-01-12" calcext:value-type="date">
            <text:p>12/01/2026</text:p>
          </table:table-cell>
          <table:table-cell table:style-name="ce8" table:number-matrix-columns-spanned="1" table:number-matrix-rows-spanned="1" table:formula="of:=INDEX([.E13:.E32];MATCH(1;([.D13:.D32]=&quot;Virat Kohli&quot;)*(MONTH([.F13:.F32])=1);0))" office:value-type="float" office:value="90000" calcext:value-type="float">
            <text:p>90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Monitor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Mrunal Thakur</text:p>
          </table:table-cell>
          <table:table-cell table:style-name="ce8" office:value-type="float" office:value="5000" calcext:value-type="float">
            <text:p>5000</text:p>
          </table:table-cell>
          <table:table-cell table:style-name="ce12" office:value-type="date" office:date-value="2026-01-13" calcext:value-type="date">
            <text:p>13/01/2026</text:p>
          </table:table-cell>
          <table:table-cell table:style-name="ce8" table:number-matrix-columns-spanned="1" table:number-matrix-rows-spanned="1" table:formula="of:=INDEX([.E14:.E33];MATCH(1;([.D14:.D33]=&quot;Mrunal Thakur&quot;)*(MONTH([.F14:.F33])=1);0))" office:value-type="float" office:value="5000" calcext:value-type="float">
            <text:p>5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4" calcext:value-type="float">
            <text:p>2014</text:p>
          </table:table-cell>
          <table:table-cell table:style-name="ce8" office:value-type="string" calcext:value-type="string">
            <text:p>Mouse</text:p>
          </table:table-cell>
          <table:table-cell table:style-name="ce8" office:value-type="string" calcext:value-type="string">
            <text:p>East</text:p>
          </table:table-cell>
          <table:table-cell table:style-name="ce8" office:value-type="string" calcext:value-type="string">
            <text:p>Sadgi Pandey</text:p>
          </table:table-cell>
          <table:table-cell table:style-name="ce8" office:value-type="float" office:value="900" calcext:value-type="float">
            <text:p>900</text:p>
          </table:table-cell>
          <table:table-cell table:style-name="ce12" office:value-type="date" office:date-value="2026-01-14" calcext:value-type="date">
            <text:p>14/01/2026</text:p>
          </table:table-cell>
          <table:table-cell table:style-name="ce8" table:number-matrix-columns-spanned="1" table:number-matrix-rows-spanned="1" table:formula="of:=INDEX([.E15:.E34];MATCH(1;([.D15:.D34]=&quot;Sadgi Pandey&quot;)*(MONTH([.F15:.F34])=1);0))" office:value-type="float" office:value="900" calcext:value-type="float">
            <text:p>9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Keyboard</text:p>
          </table:table-cell>
          <table:table-cell table:style-name="ce8" office:value-type="string" calcext:value-type="string">
            <text:p>North</text:p>
          </table:table-cell>
          <table:table-cell table:style-name="ce8" office:value-type="string" calcext:value-type="string">
            <text:p>Aarav Pandey</text:p>
          </table:table-cell>
          <table:table-cell table:style-name="ce8" office:value-type="float" office:value="950" calcext:value-type="float">
            <text:p>950</text:p>
          </table:table-cell>
          <table:table-cell table:style-name="ce12" office:value-type="date" office:date-value="2026-01-15" calcext:value-type="date">
            <text:p>15/01/2026</text:p>
          </table:table-cell>
          <table:table-cell table:style-name="ce8" table:number-matrix-columns-spanned="1" table:number-matrix-rows-spanned="1" table:formula="of:=INDEX([.E16:.E35];MATCH(1;([.D16:.D35]=&quot;Aarav Pandey&quot;)*(MONTH([.F16:.F35])=1);0))" office:value-type="float" office:value="950" calcext:value-type="float">
            <text:p>950</text:p>
          </table:table-cell>
          <table:table-cell table:number-columns-repeated="16377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use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Dhaval Prajapati</text:p>
          </table:table-cell>
          <table:table-cell table:style-name="ce8" office:value-type="float" office:value="1000" calcext:value-type="float">
            <text:p>1000</text:p>
          </table:table-cell>
          <table:table-cell table:style-name="ce12" office:value-type="date" office:date-value="2026-01-16" calcext:value-type="date">
            <text:p>16/01/2026</text:p>
          </table:table-cell>
          <table:table-cell table:style-name="ce8" table:number-matrix-columns-spanned="1" table:number-matrix-rows-spanned="1" table:formula="of:=INDEX([.E17:.E36];MATCH(1;([.D17:.D36]=&quot;Dhaval Prajapati&quot;)*(MONTH([.F17:.F36])=1);0))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Printer 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Yogesh Prajapati</text:p>
          </table:table-cell>
          <table:table-cell table:style-name="ce8" office:value-type="float" office:value="6000" calcext:value-type="float">
            <text:p>6000</text:p>
          </table:table-cell>
          <table:table-cell table:style-name="ce12" office:value-type="date" office:date-value="2026-01-17" calcext:value-type="date">
            <text:p>17/01/2026</text:p>
          </table:table-cell>
          <table:table-cell table:style-name="ce8" table:number-matrix-columns-spanned="1" table:number-matrix-rows-spanned="1" table:formula="of:=INDEX([.E18:.E37];MATCH(1;([.D18:.D37]=&quot;Yogesh Prajapati&quot;)*(MONTH([.F18:.F37])=1);0))" office:value-type="float" office:value="6000" calcext:value-type="float">
            <text:p>6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rinter 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Mahesh Chaubey</text:p>
          </table:table-cell>
          <table:table-cell table:style-name="ce8" office:value-type="float" office:value="6000" calcext:value-type="float">
            <text:p>6000</text:p>
          </table:table-cell>
          <table:table-cell table:style-name="ce12" office:value-type="date" office:date-value="2026-01-18" calcext:value-type="date">
            <text:p>18/01/2026</text:p>
          </table:table-cell>
          <table:table-cell table:style-name="ce8" table:number-matrix-columns-spanned="1" table:number-matrix-rows-spanned="1" table:formula="of:=INDEX([.E19:.E38];MATCH(1;([.D19:.D38]=&quot;Mahesh Chaubey&quot;)*(MONTH([.F19:.F38])=1);0))" office:value-type="float" office:value="6000" calcext:value-type="float">
            <text:p>6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aptop</text:p>
          </table:table-cell>
          <table:table-cell table:style-name="ce8" office:value-type="string" calcext:value-type="string">
            <text:p>North</text:p>
          </table:table-cell>
          <table:table-cell table:style-name="ce8" office:value-type="string" calcext:value-type="string">
            <text:p>Sarish kharwar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12" office:value-type="date" office:date-value="2026-01-19" calcext:value-type="date">
            <text:p>19/01/2026</text:p>
          </table:table-cell>
          <table:table-cell table:style-name="ce8" table:number-matrix-columns-spanned="1" table:number-matrix-rows-spanned="1" table:formula="of:=INDEX([.E20:.E39];MATCH(1;([.D20:.D39]=&quot;Sarish Kharwar&quot;)*(MONTH([.F20:.F39])=1);0))" office:value-type="float" office:value="100000" calcext:value-type="float">
            <text:p>100000</text:p>
          </table:table-cell>
          <table:table-cell table:number-columns-repeated="16377"/>
        </table:table-row>
        <table:table-row table:style-name="ro1"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Monitor</text:p>
          </table:table-cell>
          <table:table-cell table:style-name="ce8" office:value-type="string" calcext:value-type="string">
            <text:p>South</text:p>
          </table:table-cell>
          <table:table-cell table:style-name="ce8" office:value-type="string" calcext:value-type="string">
            <text:p>Sarvesh Mishra</text:p>
          </table:table-cell>
          <table:table-cell table:style-name="ce8" office:value-type="float" office:value="10000" calcext:value-type="float">
            <text:p>10000</text:p>
          </table:table-cell>
          <table:table-cell table:style-name="ce12" office:value-type="date" office:date-value="2026-01-10" calcext:value-type="date">
            <text:p>10/01/2026</text:p>
          </table:table-cell>
          <table:table-cell table:style-name="ce8" table:number-matrix-columns-spanned="1" table:number-matrix-rows-spanned="1" table:formula="of:=INDEX([.E21:.E40];MATCH(1;([.D21:.D40]=&quot;Sarvesh Mishra&quot;)*(MONTH([.F21:.F40])=1);0))" office:value-type="float" office:value="10000" calcext:value-type="float">
            <text:p>10000</text:p>
          </table:table-cell>
          <table:table-cell table:number-columns-repeated="16377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loyees" table:style-name="ta4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5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2" table:default-cell-style-name="Default"/>
        <table:table-column table:style-name="co35" table:default-cell-style-name="ce6"/>
        <table:table-column table:style-name="co2" table:default-cell-style-name="Default"/>
        <table:table-column table:style-name="co36" table:default-cell-style-name="ce6"/>
        <table:table-column table:style-name="co2" table:number-columns-repeated="16368" table:default-cell-style-name="Default"/>
        <table:table-row table:style-name="ro3">
          <table:table-cell table:style-name="ce17" office:value-type="string" calcext:value-type="string">
            <text:p>Employee 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partment</text:p>
          </table:table-cell>
          <table:table-cell table:style-name="ce17" office:value-type="string" calcext:value-type="string">
            <text:p>Salary</text:p>
          </table:table-cell>
          <table:table-cell table:style-name="ce17" office:value-type="string" calcext:value-type="string">
            <text:p>Joining Date</text:p>
          </table:table-cell>
          <table:table-cell table:style-name="ce17" office:value-type="string" calcext:value-type="string">
            <text:p>UPPER</text:p>
          </table:table-cell>
          <table:table-cell table:style-name="ce23" office:value-type="string" calcext:value-type="string">
            <text:p>LOWER</text:p>
          </table:table-cell>
          <table:table-cell table:style-name="ce24" office:value-type="string" calcext:value-type="string">
            <text:p>Experience(Years)</text:p>
          </table:table-cell>
          <table:table-cell table:style-name="ce23" office:value-type="string" calcext:value-type="string">
            <text:p>Working Day's Analysis</text:p>
          </table:table-cell>
          <table:table-cell table:style-name="ce23" office:value-type="string" calcext:value-type="string">
            <text:p>XLOOKUP( <text:s/>Employee <text:s/>Salary)</text:p>
          </table:table-cell>
          <table:table-cell table:style-name="ce23" office:value-type="string" calcext:value-type="string">
            <text:p>Dynamic Employee Detail</text:p>
          </table:table-cell>
          <table:table-cell table:style-name="ce26" office:value-type="string" calcext:value-type="string">
            <text:p>Round</text:p>
          </table:table-cell>
          <table:table-cell table:style-name="ce26" office:value-type="string" calcext:value-type="string">
            <text:p>Ceiling</text:p>
          </table:table-cell>
          <table:table-cell table:style-name="ce23" office:value-type="string" calcext:value-type="string">
            <text:p>Floor</text:p>
          </table:table-cell>
          <table:table-cell table:number-columns-repeated="16370"/>
        </table:table-row>
        <table:table-row table:style-name="ro3">
          <table:table-cell table:style-name="ce18" office:value-type="float" office:value="3001" calcext:value-type="float">
            <text:p>3001</text:p>
          </table:table-cell>
          <table:table-cell table:style-name="ce20" office:value-type="string" calcext:value-type="string">
            <text:p>Anuradha Prajapati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0000" calcext:value-type="float">
            <text:p><text:s/>₹ 80,000.00 </text:p>
          </table:table-cell>
          <table:table-cell table:style-name="ce22" office:value-type="date" office:date-value="2024-01-01" calcext:value-type="date">
            <text:p>01/01/2024</text:p>
          </table:table-cell>
          <table:table-cell table:style-name="ce20" table:formula="of:=UPPER([.B2])" office:value-type="string" office:string-value="ANURADHA PRAJAPATI" calcext:value-type="string">
            <text:p>ANURADHA PRAJAPATI</text:p>
          </table:table-cell>
          <table:table-cell table:style-name="ce20" table:formula="of:=LOWER([.B2])" office:value-type="string" office:string-value="anuradha prajapati" calcext:value-type="string">
            <text:p>anuradha prajapati</text:p>
          </table:table-cell>
          <table:table-cell table:style-name="ce20" table:formula="of:=DATEDIF([.E2];TODAY();&quot;Y&quot;)" office:value-type="float" office:value="2" calcext:value-type="float">
            <text:p>2</text:p>
          </table:table-cell>
          <table:table-cell table:style-name="ce20" table:formula="of:=TODAY()-[.E2]" office:value-type="float" office:value="867" calcext:value-type="float">
            <text:p>867</text:p>
          </table:table-cell>
          <table:table-cell table:style-name="ce20" table:formula="of:=_xlfn.xlookup(3001;[.A2:.A26];[.D2:.D26])" office:value-type="float" office:value="80000" calcext:value-type="float">
            <text:p>80000</text:p>
          </table:table-cell>
          <table:table-cell table:style-name="ce20" table:formula="of:=INDEX([.C2:.C21];MATCH(3001;[.A2:.A21];0))" office:value-type="string" office:string-value="HR" calcext:value-type="string">
            <text:p>HR</text:p>
          </table:table-cell>
          <table:table-cell table:style-name="ce27" table:formula="of:=ROUND([.D2];0)" office:value-type="float" office:value="80000" calcext:value-type="float">
            <text:p><text:s/>₹ 80,000.00 </text:p>
          </table:table-cell>
          <table:table-cell table:style-name="ce28" table:formula="of:=COM.MICROSOFT.CEILING([.D2];100)" office:value-type="float" office:value="80000" calcext:value-type="float">
            <text:p>80000</text:p>
          </table:table-cell>
          <table:table-cell table:style-name="ce28" table:formula="of:=COM.MICROSOFT.FLOOR([.D2];100)" office:value-type="float" office:value="80000" calcext:value-type="float">
            <text:p>80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2" calcext:value-type="float">
            <text:p>3002</text:p>
          </table:table-cell>
          <table:table-cell table:style-name="ce20" office:value-type="string" calcext:value-type="string">
            <text:p>Yashraj Sharma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70000" calcext:value-type="float">
            <text:p><text:s/>₹ 70,000.00 </text:p>
          </table:table-cell>
          <table:table-cell table:style-name="ce22" office:value-type="date" office:date-value="2026-01-12" calcext:value-type="date">
            <text:p>12/01/2026</text:p>
          </table:table-cell>
          <table:table-cell table:style-name="ce20" table:formula="of:=UPPER([.B3])" office:value-type="string" office:string-value="YASHRAJ SHARMA" calcext:value-type="string">
            <text:p>YASHRAJ SHARMA</text:p>
          </table:table-cell>
          <table:table-cell table:style-name="ce20" table:formula="of:=LOWER([.B3])" office:value-type="string" office:string-value="yashraj sharma" calcext:value-type="string">
            <text:p>yashraj sharma</text:p>
          </table:table-cell>
          <table:table-cell table:style-name="ce20" table:formula="of:=DATEDIF([.E3];TODAY();&quot;Y&quot;)" office:value-type="float" office:value="0" calcext:value-type="float">
            <text:p>0</text:p>
          </table:table-cell>
          <table:table-cell table:style-name="ce20" table:formula="of:=TODAY()-[.E3]" office:value-type="float" office:value="125" calcext:value-type="float">
            <text:p>125</text:p>
          </table:table-cell>
          <table:table-cell table:style-name="ce20" table:formula="of:=_xlfn.xlookup(3002;[.A3:.A27];[.D3:.D27])" office:value-type="float" office:value="70000" calcext:value-type="float">
            <text:p>70000</text:p>
          </table:table-cell>
          <table:table-cell table:style-name="ce20" table:formula="of:=INDEX([.C3:.C22];MATCH(3002;[.A3:.A22];0))" office:value-type="string" office:string-value="IT" calcext:value-type="string">
            <text:p>IT</text:p>
          </table:table-cell>
          <table:table-cell table:style-name="ce27" table:formula="of:=ROUND([.D3];0)" office:value-type="float" office:value="70000" calcext:value-type="float">
            <text:p><text:s/>₹ 70,000.00 </text:p>
          </table:table-cell>
          <table:table-cell table:style-name="ce28" table:formula="of:=COM.MICROSOFT.CEILING([.D3];100)" office:value-type="float" office:value="70000" calcext:value-type="float">
            <text:p>70000</text:p>
          </table:table-cell>
          <table:table-cell table:style-name="ce28" table:formula="of:=COM.MICROSOFT.FLOOR([.D3];100)" office:value-type="float" office:value="70000" calcext:value-type="float">
            <text:p>70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3" calcext:value-type="float">
            <text:p>3003</text:p>
          </table:table-cell>
          <table:table-cell table:style-name="ce20" office:value-type="string" calcext:value-type="string">
            <text:p>Punit Mishra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90000" calcext:value-type="float">
            <text:p><text:s/>₹ 90,000.00 </text:p>
          </table:table-cell>
          <table:table-cell table:style-name="ce22" office:value-type="date" office:date-value="2026-01-03" calcext:value-type="date">
            <text:p>03/01/2026</text:p>
          </table:table-cell>
          <table:table-cell table:style-name="ce20" table:formula="of:=UPPER([.B4])" office:value-type="string" office:string-value="PUNIT MISHRA" calcext:value-type="string">
            <text:p>PUNIT MISHRA</text:p>
          </table:table-cell>
          <table:table-cell table:style-name="ce20" table:formula="of:=LOWER([.B4])" office:value-type="string" office:string-value="punit mishra" calcext:value-type="string">
            <text:p>punit mishra</text:p>
          </table:table-cell>
          <table:table-cell table:style-name="ce20" table:formula="of:=DATEDIF([.E4];TODAY();&quot;Y&quot;)" office:value-type="float" office:value="0" calcext:value-type="float">
            <text:p>0</text:p>
          </table:table-cell>
          <table:table-cell table:style-name="ce20" table:formula="of:=TODAY()-[.E4]" office:value-type="float" office:value="134" calcext:value-type="float">
            <text:p>134</text:p>
          </table:table-cell>
          <table:table-cell table:style-name="ce20" table:formula="of:=_xlfn.xlookup(3003;[.A4:.A28];[.D4:.D28])" office:value-type="float" office:value="90000" calcext:value-type="float">
            <text:p>90000</text:p>
          </table:table-cell>
          <table:table-cell table:style-name="ce20" table:formula="of:=INDEX([.C4:.C23];MATCH(3003;[.A4:.A23];0))" office:value-type="string" office:string-value="HR" calcext:value-type="string">
            <text:p>HR</text:p>
          </table:table-cell>
          <table:table-cell table:style-name="ce27" table:formula="of:=ROUND([.D4];0)" office:value-type="float" office:value="90000" calcext:value-type="float">
            <text:p><text:s/>₹ 90,000.00 </text:p>
          </table:table-cell>
          <table:table-cell table:style-name="ce28" table:formula="of:=COM.MICROSOFT.CEILING([.D4];100)" office:value-type="float" office:value="90000" calcext:value-type="float">
            <text:p>90000</text:p>
          </table:table-cell>
          <table:table-cell table:style-name="ce28" table:formula="of:=COM.MICROSOFT.FLOOR([.D4];100)" office:value-type="float" office:value="90000" calcext:value-type="float">
            <text:p>90000</text:p>
          </table:table-cell>
          <table:table-cell/>
          <table:table-cell table:style-name="ce29" office:value-type="string" calcext:value-type="string">
            <text:p>INDIRECT Function</text:p>
          </table:table-cell>
          <table:table-cell table:number-columns-repeated="16368"/>
        </table:table-row>
        <table:table-row table:style-name="ro3">
          <table:table-cell table:style-name="ce18" office:value-type="float" office:value="3004" calcext:value-type="float">
            <text:p>3004</text:p>
          </table:table-cell>
          <table:table-cell table:style-name="ce20" office:value-type="string" calcext:value-type="string">
            <text:p>Amit Maharana</text:p>
          </table:table-cell>
          <table:table-cell table:style-name="ce18" office:value-type="string" calcext:value-type="string">
            <text:p>Finance</text:p>
          </table:table-cell>
          <table:table-cell table:style-name="ce21" office:value-type="float" office:value="100000" calcext:value-type="float">
            <text:p><text:s/>₹ 1,00,000.00 </text:p>
          </table:table-cell>
          <table:table-cell table:style-name="ce22" office:value-type="date" office:date-value="2022-01-04" calcext:value-type="date">
            <text:p>04/01/2022</text:p>
          </table:table-cell>
          <table:table-cell table:style-name="ce20" table:formula="of:=UPPER([.B5])" office:value-type="string" office:string-value="AMIT MAHARANA" calcext:value-type="string">
            <text:p>AMIT MAHARANA</text:p>
          </table:table-cell>
          <table:table-cell table:style-name="ce20" table:formula="of:=LOWER([.B5])" office:value-type="string" office:string-value="amit maharana" calcext:value-type="string">
            <text:p>amit maharana</text:p>
          </table:table-cell>
          <table:table-cell table:style-name="ce20" table:formula="of:=DATEDIF([.E5];TODAY();&quot;Y&quot;)" office:value-type="float" office:value="4" calcext:value-type="float">
            <text:p>4</text:p>
          </table:table-cell>
          <table:table-cell table:style-name="ce20" table:formula="of:=TODAY()-[.E5]" office:value-type="float" office:value="1594" calcext:value-type="float">
            <text:p>1594</text:p>
          </table:table-cell>
          <table:table-cell table:style-name="ce20" table:formula="of:=_xlfn.xlookup(3004;[.A5:.A29];[.D5:.D29])" office:value-type="float" office:value="100000" calcext:value-type="float">
            <text:p>100000</text:p>
          </table:table-cell>
          <table:table-cell table:style-name="ce20" table:formula="of:=INDEX([.C5:.C24];MATCH(3004;[.A5:.A24];0))" office:value-type="string" office:string-value="Finance" calcext:value-type="string">
            <text:p>Finance</text:p>
          </table:table-cell>
          <table:table-cell table:style-name="ce27" table:formula="of:=ROUND([.D5];0)" office:value-type="float" office:value="100000" calcext:value-type="float">
            <text:p><text:s/>₹ 1,00,000.00 </text:p>
          </table:table-cell>
          <table:table-cell table:style-name="ce28" table:formula="of:=COM.MICROSOFT.CEILING([.D5];100)" office:value-type="float" office:value="100000" calcext:value-type="float">
            <text:p>100000</text:p>
          </table:table-cell>
          <table:table-cell table:style-name="ce28" table:formula="of:=COM.MICROSOFT.FLOOR([.D5];100)" office:value-type="float" office:value="100000" calcext:value-type="float">
            <text:p>100000</text:p>
          </table:table-cell>
          <table:table-cell/>
          <table:table-cell table:style-name="ce30" table:formula="of:=SUM(INDIRECT(&quot;D2:D5&quot;))" office:value-type="float" office:value="340000" calcext:value-type="float">
            <text:p>340000</text:p>
          </table:table-cell>
          <table:table-cell table:number-columns-repeated="16368"/>
        </table:table-row>
        <table:table-row table:style-name="ro3">
          <table:table-cell table:style-name="ce18" office:value-type="float" office:value="3005" calcext:value-type="float">
            <text:p>3005</text:p>
          </table:table-cell>
          <table:table-cell table:style-name="ce20" office:value-type="string" calcext:value-type="string">
            <text:p>Abhiraj Sharma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70000" calcext:value-type="float">
            <text:p><text:s/>₹ 70,000.00 </text:p>
          </table:table-cell>
          <table:table-cell table:style-name="ce22" office:value-type="date" office:date-value="2026-01-05" calcext:value-type="date">
            <text:p>05/01/2026</text:p>
          </table:table-cell>
          <table:table-cell table:style-name="ce20" table:formula="of:=UPPER([.B6])" office:value-type="string" office:string-value="ABHIRAJ SHARMA" calcext:value-type="string">
            <text:p>ABHIRAJ SHARMA</text:p>
          </table:table-cell>
          <table:table-cell table:style-name="ce20" table:formula="of:=LOWER([.B6])" office:value-type="string" office:string-value="abhiraj sharma" calcext:value-type="string">
            <text:p>abhiraj sharma</text:p>
          </table:table-cell>
          <table:table-cell table:style-name="ce20" table:formula="of:=DATEDIF([.E6];TODAY();&quot;Y&quot;)" office:value-type="float" office:value="0" calcext:value-type="float">
            <text:p>0</text:p>
          </table:table-cell>
          <table:table-cell table:style-name="ce20" table:formula="of:=TODAY()-[.E6]" office:value-type="float" office:value="132" calcext:value-type="float">
            <text:p>132</text:p>
          </table:table-cell>
          <table:table-cell table:style-name="ce20" table:formula="of:=_xlfn.xlookup(3005;[.A6:.A30];[.D6:.D30])" office:value-type="float" office:value="70000" calcext:value-type="float">
            <text:p>70000</text:p>
          </table:table-cell>
          <table:table-cell table:style-name="ce20" table:formula="of:=INDEX([.C6:.C25];MATCH(3005;[.A6:.A25];0))" office:value-type="string" office:string-value="IT" calcext:value-type="string">
            <text:p>IT</text:p>
          </table:table-cell>
          <table:table-cell table:style-name="ce27" table:formula="of:=ROUND([.D6];0)" office:value-type="float" office:value="70000" calcext:value-type="float">
            <text:p><text:s/>₹ 70,000.00 </text:p>
          </table:table-cell>
          <table:table-cell table:style-name="ce28" table:formula="of:=COM.MICROSOFT.CEILING([.D6];100)" office:value-type="float" office:value="70000" calcext:value-type="float">
            <text:p>70000</text:p>
          </table:table-cell>
          <table:table-cell table:style-name="ce28" table:formula="of:=COM.MICROSOFT.FLOOR([.D6];100)" office:value-type="float" office:value="70000" calcext:value-type="float">
            <text:p>70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6" calcext:value-type="float">
            <text:p>3006</text:p>
          </table:table-cell>
          <table:table-cell table:style-name="ce20" office:value-type="string" calcext:value-type="string">
            <text:p>Vaibhavraj Sharma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80000" calcext:value-type="float">
            <text:p><text:s/>₹ 80,000.00 </text:p>
          </table:table-cell>
          <table:table-cell table:style-name="ce22" office:value-type="date" office:date-value="2026-01-24" calcext:value-type="date">
            <text:p>24/01/2026</text:p>
          </table:table-cell>
          <table:table-cell table:style-name="ce20" table:formula="of:=UPPER([.B7])" office:value-type="string" office:string-value="VAIBHAVRAJ SHARMA" calcext:value-type="string">
            <text:p>VAIBHAVRAJ SHARMA</text:p>
          </table:table-cell>
          <table:table-cell table:style-name="ce20" table:formula="of:=LOWER([.B7])" office:value-type="string" office:string-value="vaibhavraj sharma" calcext:value-type="string">
            <text:p>vaibhavraj sharma</text:p>
          </table:table-cell>
          <table:table-cell table:style-name="ce20" table:formula="of:=DATEDIF([.E7];TODAY();&quot;Y&quot;)" office:value-type="float" office:value="0" calcext:value-type="float">
            <text:p>0</text:p>
          </table:table-cell>
          <table:table-cell table:style-name="ce20" table:formula="of:=TODAY()-[.E7]" office:value-type="float" office:value="113" calcext:value-type="float">
            <text:p>113</text:p>
          </table:table-cell>
          <table:table-cell table:style-name="ce20" table:formula="of:=_xlfn.xlookup(3006;[.A7:.A31];[.D7:.D31])" office:value-type="float" office:value="80000" calcext:value-type="float">
            <text:p>80000</text:p>
          </table:table-cell>
          <table:table-cell table:style-name="ce20" table:formula="of:=INDEX([.C7:.C26];MATCH(3006;[.A7:.A26];0))" office:value-type="string" office:string-value="IT" calcext:value-type="string">
            <text:p>IT</text:p>
          </table:table-cell>
          <table:table-cell table:style-name="ce27" table:formula="of:=ROUND([.D7];0)" office:value-type="float" office:value="80000" calcext:value-type="float">
            <text:p><text:s/>₹ 80,000.00 </text:p>
          </table:table-cell>
          <table:table-cell table:style-name="ce28" table:formula="of:=COM.MICROSOFT.CEILING([.D7];100)" office:value-type="float" office:value="80000" calcext:value-type="float">
            <text:p>80000</text:p>
          </table:table-cell>
          <table:table-cell table:style-name="ce28" table:formula="of:=COM.MICROSOFT.FLOOR([.D7];100)" office:value-type="float" office:value="80000" calcext:value-type="float">
            <text:p>80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7" calcext:value-type="float">
            <text:p>3007</text:p>
          </table:table-cell>
          <table:table-cell table:style-name="ce20" office:value-type="string" calcext:value-type="string">
            <text:p>Sugam Pradhan</text:p>
          </table:table-cell>
          <table:table-cell table:style-name="ce18" office:value-type="string" calcext:value-type="string">
            <text:p>Marketing</text:p>
          </table:table-cell>
          <table:table-cell table:style-name="ce21" office:value-type="float" office:value="82666.6666666667" calcext:value-type="float">
            <text:p><text:s/>₹ 82,666.67 </text:p>
          </table:table-cell>
          <table:table-cell table:style-name="ce22" office:value-type="date" office:date-value="2021-01-27" calcext:value-type="date">
            <text:p>27/01/2021</text:p>
          </table:table-cell>
          <table:table-cell table:style-name="ce20" table:formula="of:=UPPER([.B8])" office:value-type="string" office:string-value="SUGAM PRADHAN" calcext:value-type="string">
            <text:p>SUGAM PRADHAN</text:p>
          </table:table-cell>
          <table:table-cell table:style-name="ce20" table:formula="of:=LOWER([.B8])" office:value-type="string" office:string-value="sugam pradhan" calcext:value-type="string">
            <text:p>sugam pradhan</text:p>
          </table:table-cell>
          <table:table-cell table:style-name="ce20" table:formula="of:=DATEDIF([.E8];TODAY();&quot;Y&quot;)" office:value-type="float" office:value="5" calcext:value-type="float">
            <text:p>5</text:p>
          </table:table-cell>
          <table:table-cell table:style-name="ce20" table:formula="of:=TODAY()-[.E8]" office:value-type="float" office:value="1936" calcext:value-type="float">
            <text:p>1936</text:p>
          </table:table-cell>
          <table:table-cell table:style-name="ce25" table:formula="of:=_xlfn.xlookup(3007;[.A8:.A32];[.D8:.D32])" office:value-type="float" office:value="82666.6666666667" calcext:value-type="float">
            <text:p>82666.67</text:p>
          </table:table-cell>
          <table:table-cell table:style-name="ce20" table:formula="of:=INDEX([.C8:.C27];MATCH(3007;[.A8:.A27];0))" office:value-type="string" office:string-value="Marketing" calcext:value-type="string">
            <text:p>Marketing</text:p>
          </table:table-cell>
          <table:table-cell table:style-name="ce27" table:formula="of:=ROUND([.D8];0)" office:value-type="float" office:value="82667" calcext:value-type="float">
            <text:p><text:s/>₹ 82,667.00 </text:p>
          </table:table-cell>
          <table:table-cell table:style-name="ce28" table:formula="of:=COM.MICROSOFT.CEILING([.D8];100)" office:value-type="float" office:value="82700" calcext:value-type="float">
            <text:p>82700</text:p>
          </table:table-cell>
          <table:table-cell table:style-name="ce28" table:formula="of:=COM.MICROSOFT.FLOOR([.D8];100)" office:value-type="float" office:value="82600" calcext:value-type="float">
            <text:p>826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8" calcext:value-type="float">
            <text:p>3008</text:p>
          </table:table-cell>
          <table:table-cell table:style-name="ce20" office:value-type="string" calcext:value-type="string">
            <text:p>Prabhat Pandey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82952.380952381" calcext:value-type="float">
            <text:p><text:s/>₹ 82,952.38 </text:p>
          </table:table-cell>
          <table:table-cell table:style-name="ce22" office:value-type="date" office:date-value="2026-01-18" calcext:value-type="date">
            <text:p>18/01/2026</text:p>
          </table:table-cell>
          <table:table-cell table:style-name="ce20" table:formula="of:=UPPER([.B9])" office:value-type="string" office:string-value="PRABHAT PANDEY" calcext:value-type="string">
            <text:p>PRABHAT PANDEY</text:p>
          </table:table-cell>
          <table:table-cell table:style-name="ce20" table:formula="of:=LOWER([.B9])" office:value-type="string" office:string-value="prabhat pandey" calcext:value-type="string">
            <text:p>prabhat pandey</text:p>
          </table:table-cell>
          <table:table-cell table:style-name="ce20" table:formula="of:=DATEDIF([.E9];TODAY();&quot;Y&quot;)" office:value-type="float" office:value="0" calcext:value-type="float">
            <text:p>0</text:p>
          </table:table-cell>
          <table:table-cell table:style-name="ce20" table:formula="of:=TODAY()-[.E9]" office:value-type="float" office:value="119" calcext:value-type="float">
            <text:p>119</text:p>
          </table:table-cell>
          <table:table-cell table:style-name="ce25" table:formula="of:=_xlfn.xlookup(3008;[.A9:.A33];[.D9:.D33])" office:value-type="float" office:value="82952.380952381" calcext:value-type="float">
            <text:p>82952.38</text:p>
          </table:table-cell>
          <table:table-cell table:style-name="ce20" table:formula="of:=INDEX([.C9:.C28];MATCH(3008;[.A9:.A28];0))" office:value-type="string" office:string-value="IT" calcext:value-type="string">
            <text:p>IT</text:p>
          </table:table-cell>
          <table:table-cell table:style-name="ce27" table:formula="of:=ROUND([.D9];0)" office:value-type="float" office:value="82952" calcext:value-type="float">
            <text:p><text:s/>₹ 82,952.00 </text:p>
          </table:table-cell>
          <table:table-cell table:style-name="ce28" table:formula="of:=COM.MICROSOFT.CEILING([.D9];100)" office:value-type="float" office:value="83000" calcext:value-type="float">
            <text:p>83000</text:p>
          </table:table-cell>
          <table:table-cell table:style-name="ce28" table:formula="of:=COM.MICROSOFT.FLOOR([.D9];100)" office:value-type="float" office:value="82900" calcext:value-type="float">
            <text:p>829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09" calcext:value-type="float">
            <text:p>3009</text:p>
          </table:table-cell>
          <table:table-cell table:style-name="ce20" office:value-type="string" calcext:value-type="string">
            <text:p>Deepak Paswan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83238.0952380952" calcext:value-type="float">
            <text:p><text:s/>₹ 83,238.10 </text:p>
          </table:table-cell>
          <table:table-cell table:style-name="ce22" office:value-type="date" office:date-value="2026-01-19" calcext:value-type="date">
            <text:p>19/01/2026</text:p>
          </table:table-cell>
          <table:table-cell table:style-name="ce20" table:formula="of:=UPPER([.B10])" office:value-type="string" office:string-value="DEEPAK PASWAN" calcext:value-type="string">
            <text:p>DEEPAK PASWAN</text:p>
          </table:table-cell>
          <table:table-cell table:style-name="ce20" table:formula="of:=LOWER([.B10])" office:value-type="string" office:string-value="deepak paswan" calcext:value-type="string">
            <text:p>deepak paswan</text:p>
          </table:table-cell>
          <table:table-cell table:style-name="ce20" table:formula="of:=DATEDIF([.E10];TODAY();&quot;Y&quot;)" office:value-type="float" office:value="0" calcext:value-type="float">
            <text:p>0</text:p>
          </table:table-cell>
          <table:table-cell table:style-name="ce20" table:formula="of:=TODAY()-[.E10]" office:value-type="float" office:value="118" calcext:value-type="float">
            <text:p>118</text:p>
          </table:table-cell>
          <table:table-cell table:style-name="ce25" table:formula="of:=_xlfn.xlookup(3009;[.A10:.A34];[.D10:.D34])" office:value-type="float" office:value="83238.0952380952" calcext:value-type="float">
            <text:p>83238.10</text:p>
          </table:table-cell>
          <table:table-cell table:style-name="ce20" table:formula="of:=INDEX([.C10:.C29];MATCH(3009;[.A10:.A29];0))" office:value-type="string" office:string-value="IT" calcext:value-type="string">
            <text:p>IT</text:p>
          </table:table-cell>
          <table:table-cell table:style-name="ce27" table:formula="of:=ROUND([.D10];0)" office:value-type="float" office:value="83238" calcext:value-type="float">
            <text:p><text:s/>₹ 83,238.00 </text:p>
          </table:table-cell>
          <table:table-cell table:style-name="ce28" table:formula="of:=COM.MICROSOFT.CEILING([.D10];100)" office:value-type="float" office:value="83300" calcext:value-type="float">
            <text:p>83300</text:p>
          </table:table-cell>
          <table:table-cell table:style-name="ce28" table:formula="of:=COM.MICROSOFT.FLOOR([.D10];100)" office:value-type="float" office:value="83200" calcext:value-type="float">
            <text:p>832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0" calcext:value-type="float">
            <text:p>3010</text:p>
          </table:table-cell>
          <table:table-cell table:style-name="ce20" office:value-type="string" calcext:value-type="string">
            <text:p>Keshav Singh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3523.8095238095" calcext:value-type="float">
            <text:p><text:s/>₹ 83,523.81 </text:p>
          </table:table-cell>
          <table:table-cell table:style-name="ce22" office:value-type="date" office:date-value="2026-01-10" calcext:value-type="date">
            <text:p>10/01/2026</text:p>
          </table:table-cell>
          <table:table-cell table:style-name="ce20" table:formula="of:=UPPER([.B11])" office:value-type="string" office:string-value="KESHAV SINGH" calcext:value-type="string">
            <text:p>KESHAV SINGH</text:p>
          </table:table-cell>
          <table:table-cell table:style-name="ce20" table:formula="of:=LOWER([.B11])" office:value-type="string" office:string-value="keshav singh" calcext:value-type="string">
            <text:p>keshav singh</text:p>
          </table:table-cell>
          <table:table-cell table:style-name="ce20" table:formula="of:=DATEDIF([.E11];TODAY();&quot;Y&quot;)" office:value-type="float" office:value="0" calcext:value-type="float">
            <text:p>0</text:p>
          </table:table-cell>
          <table:table-cell table:style-name="ce20" table:formula="of:=TODAY()-[.E11]" office:value-type="float" office:value="127" calcext:value-type="float">
            <text:p>127</text:p>
          </table:table-cell>
          <table:table-cell table:style-name="ce25" table:formula="of:=_xlfn.xlookup(3010;[.A11:.A35];[.D11:.D35])" office:value-type="float" office:value="83523.8095238095" calcext:value-type="float">
            <text:p>83523.81</text:p>
          </table:table-cell>
          <table:table-cell table:style-name="ce20" table:formula="of:=INDEX([.C11:.C30];MATCH(3010;[.A11:.A30];0))" office:value-type="string" office:string-value="HR" calcext:value-type="string">
            <text:p>HR</text:p>
          </table:table-cell>
          <table:table-cell table:style-name="ce27" table:formula="of:=ROUND([.D11];0)" office:value-type="float" office:value="83524" calcext:value-type="float">
            <text:p><text:s/>₹ 83,524.00 </text:p>
          </table:table-cell>
          <table:table-cell table:style-name="ce28" table:formula="of:=COM.MICROSOFT.CEILING([.D11];100)" office:value-type="float" office:value="83600" calcext:value-type="float">
            <text:p>83600</text:p>
          </table:table-cell>
          <table:table-cell table:style-name="ce28" table:formula="of:=COM.MICROSOFT.FLOOR([.D11];100)" office:value-type="float" office:value="83500" calcext:value-type="float">
            <text:p>835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1" calcext:value-type="float">
            <text:p>3011</text:p>
          </table:table-cell>
          <table:table-cell table:style-name="ce20" office:value-type="string" calcext:value-type="string">
            <text:p>Kashyap Verma</text:p>
          </table:table-cell>
          <table:table-cell table:style-name="ce18" office:value-type="string" calcext:value-type="string">
            <text:p>Finance</text:p>
          </table:table-cell>
          <table:table-cell table:style-name="ce21" office:value-type="float" office:value="83809.5238095238" calcext:value-type="float">
            <text:p><text:s/>₹ 83,809.52 </text:p>
          </table:table-cell>
          <table:table-cell table:style-name="ce22" office:value-type="date" office:date-value="2026-01-11" calcext:value-type="date">
            <text:p>11/01/2026</text:p>
          </table:table-cell>
          <table:table-cell table:style-name="ce20" table:formula="of:=UPPER([.B12])" office:value-type="string" office:string-value="KASHYAP VERMA" calcext:value-type="string">
            <text:p>KASHYAP VERMA</text:p>
          </table:table-cell>
          <table:table-cell table:style-name="ce20" table:formula="of:=LOWER([.B12])" office:value-type="string" office:string-value="kashyap verma" calcext:value-type="string">
            <text:p>kashyap verma</text:p>
          </table:table-cell>
          <table:table-cell table:style-name="ce20" table:formula="of:=DATEDIF([.E12];TODAY();&quot;Y&quot;)" office:value-type="float" office:value="0" calcext:value-type="float">
            <text:p>0</text:p>
          </table:table-cell>
          <table:table-cell table:style-name="ce20" table:formula="of:=TODAY()-[.E12]" office:value-type="float" office:value="126" calcext:value-type="float">
            <text:p>126</text:p>
          </table:table-cell>
          <table:table-cell table:style-name="ce25" table:formula="of:=_xlfn.xlookup(3011;[.A12:.A36];[.D12:.D36])" office:value-type="float" office:value="83809.5238095238" calcext:value-type="float">
            <text:p>83809.52</text:p>
          </table:table-cell>
          <table:table-cell table:style-name="ce20" table:formula="of:=INDEX([.C12:.C31];MATCH(3011;[.A12:.A31];0))" office:value-type="string" office:string-value="Finance" calcext:value-type="string">
            <text:p>Finance</text:p>
          </table:table-cell>
          <table:table-cell table:style-name="ce27" table:formula="of:=ROUND([.D12];0)" office:value-type="float" office:value="83810" calcext:value-type="float">
            <text:p><text:s/>₹ 83,810.00 </text:p>
          </table:table-cell>
          <table:table-cell table:style-name="ce28" table:formula="of:=COM.MICROSOFT.CEILING([.D12];100)" office:value-type="float" office:value="83900" calcext:value-type="float">
            <text:p>83900</text:p>
          </table:table-cell>
          <table:table-cell table:style-name="ce28" table:formula="of:=COM.MICROSOFT.FLOOR([.D12];100)" office:value-type="float" office:value="83800" calcext:value-type="float">
            <text:p>838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2" calcext:value-type="float">
            <text:p>3012</text:p>
          </table:table-cell>
          <table:table-cell table:style-name="ce20" office:value-type="string" calcext:value-type="string">
            <text:p>Virat Kohli</text:p>
          </table:table-cell>
          <table:table-cell table:style-name="ce18" office:value-type="string" calcext:value-type="string">
            <text:p>Finance</text:p>
          </table:table-cell>
          <table:table-cell table:style-name="ce21" office:value-type="float" office:value="84095.2380952381" calcext:value-type="float">
            <text:p><text:s/>₹ 84,095.24 </text:p>
          </table:table-cell>
          <table:table-cell table:style-name="ce22" office:value-type="date" office:date-value="2022-01-12" calcext:value-type="date">
            <text:p>12/01/2022</text:p>
          </table:table-cell>
          <table:table-cell table:style-name="ce20" table:formula="of:=UPPER([.B13])" office:value-type="string" office:string-value="VIRAT KOHLI" calcext:value-type="string">
            <text:p>VIRAT KOHLI</text:p>
          </table:table-cell>
          <table:table-cell table:style-name="ce20" table:formula="of:=LOWER([.B13])" office:value-type="string" office:string-value="virat kohli" calcext:value-type="string">
            <text:p>virat kohli</text:p>
          </table:table-cell>
          <table:table-cell table:style-name="ce20" table:formula="of:=DATEDIF([.E13];TODAY();&quot;Y&quot;)" office:value-type="float" office:value="4" calcext:value-type="float">
            <text:p>4</text:p>
          </table:table-cell>
          <table:table-cell table:style-name="ce20" table:formula="of:=TODAY()-[.E13]" office:value-type="float" office:value="1586" calcext:value-type="float">
            <text:p>1586</text:p>
          </table:table-cell>
          <table:table-cell table:style-name="ce25" table:formula="of:=_xlfn.xlookup(3012;[.A13:.A37];[.D13:.D37])" office:value-type="float" office:value="84095.2380952381" calcext:value-type="float">
            <text:p>84095.24</text:p>
          </table:table-cell>
          <table:table-cell table:style-name="ce20" table:formula="of:=INDEX([.C13:.C32];MATCH(3012;[.A13:.A32];0))" office:value-type="string" office:string-value="Finance" calcext:value-type="string">
            <text:p>Finance</text:p>
          </table:table-cell>
          <table:table-cell table:style-name="ce27" table:formula="of:=ROUND([.D13];0)" office:value-type="float" office:value="84095" calcext:value-type="float">
            <text:p><text:s/>₹ 84,095.00 </text:p>
          </table:table-cell>
          <table:table-cell table:style-name="ce28" table:formula="of:=COM.MICROSOFT.CEILING([.D13];100)" office:value-type="float" office:value="84100" calcext:value-type="float">
            <text:p>84100</text:p>
          </table:table-cell>
          <table:table-cell table:style-name="ce28" table:formula="of:=COM.MICROSOFT.FLOOR([.D13];100)" office:value-type="float" office:value="84000" calcext:value-type="float">
            <text:p>84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3" calcext:value-type="float">
            <text:p>3013</text:p>
          </table:table-cell>
          <table:table-cell table:style-name="ce20" office:value-type="string" calcext:value-type="string">
            <text:p>Mrunal Thakur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4380.9523809524" calcext:value-type="float">
            <text:p><text:s/>₹ 84,380.95 </text:p>
          </table:table-cell>
          <table:table-cell table:style-name="ce22" office:value-type="date" office:date-value="2026-01-13" calcext:value-type="date">
            <text:p>13/01/2026</text:p>
          </table:table-cell>
          <table:table-cell table:style-name="ce20" table:formula="of:=UPPER([.B14])" office:value-type="string" office:string-value="MRUNAL THAKUR" calcext:value-type="string">
            <text:p>MRUNAL THAKUR</text:p>
          </table:table-cell>
          <table:table-cell table:style-name="ce20" table:formula="of:=LOWER([.B14])" office:value-type="string" office:string-value="mrunal thakur" calcext:value-type="string">
            <text:p>mrunal thakur</text:p>
          </table:table-cell>
          <table:table-cell table:style-name="ce20" table:formula="of:=DATEDIF([.E14];TODAY();&quot;Y&quot;)" office:value-type="float" office:value="0" calcext:value-type="float">
            <text:p>0</text:p>
          </table:table-cell>
          <table:table-cell table:style-name="ce20" table:formula="of:=TODAY()-[.E14]" office:value-type="float" office:value="124" calcext:value-type="float">
            <text:p>124</text:p>
          </table:table-cell>
          <table:table-cell table:style-name="ce25" table:formula="of:=_xlfn.xlookup(3013;[.A14:.A38];[.D14:.D38])" office:value-type="float" office:value="84380.9523809524" calcext:value-type="float">
            <text:p>84380.95</text:p>
          </table:table-cell>
          <table:table-cell table:style-name="ce20" table:formula="of:=INDEX([.C14:.C33];MATCH(3013;[.A14:.A33];0))" office:value-type="string" office:string-value="HR" calcext:value-type="string">
            <text:p>HR</text:p>
          </table:table-cell>
          <table:table-cell table:style-name="ce27" table:formula="of:=ROUND([.D14];0)" office:value-type="float" office:value="84381" calcext:value-type="float">
            <text:p><text:s/>₹ 84,381.00 </text:p>
          </table:table-cell>
          <table:table-cell table:style-name="ce28" table:formula="of:=COM.MICROSOFT.CEILING([.D14];100)" office:value-type="float" office:value="84400" calcext:value-type="float">
            <text:p>84400</text:p>
          </table:table-cell>
          <table:table-cell table:style-name="ce28" table:formula="of:=COM.MICROSOFT.FLOOR([.D14];100)" office:value-type="float" office:value="84300" calcext:value-type="float">
            <text:p>843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4" calcext:value-type="float">
            <text:p>3014</text:p>
          </table:table-cell>
          <table:table-cell table:style-name="ce20" office:value-type="string" calcext:value-type="string">
            <text:p>Sadgi Pandey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4666.6666666667" calcext:value-type="float">
            <text:p><text:s/>₹ 84,666.67 </text:p>
          </table:table-cell>
          <table:table-cell table:style-name="ce22" office:value-type="date" office:date-value="2024-01-14" calcext:value-type="date">
            <text:p>14/01/2024</text:p>
          </table:table-cell>
          <table:table-cell table:style-name="ce20" table:formula="of:=UPPER([.B15])" office:value-type="string" office:string-value="SADGI PANDEY" calcext:value-type="string">
            <text:p>SADGI PANDEY</text:p>
          </table:table-cell>
          <table:table-cell table:style-name="ce20" table:formula="of:=LOWER([.B15])" office:value-type="string" office:string-value="sadgi pandey" calcext:value-type="string">
            <text:p>sadgi pandey</text:p>
          </table:table-cell>
          <table:table-cell table:style-name="ce20" table:formula="of:=DATEDIF([.E15];TODAY();&quot;Y&quot;)" office:value-type="float" office:value="2" calcext:value-type="float">
            <text:p>2</text:p>
          </table:table-cell>
          <table:table-cell table:style-name="ce20" table:formula="of:=TODAY()-[.E15]" office:value-type="float" office:value="854" calcext:value-type="float">
            <text:p>854</text:p>
          </table:table-cell>
          <table:table-cell table:style-name="ce25" table:formula="of:=_xlfn.xlookup(3014;[.A15:.A39];[.D15:.D39])" office:value-type="float" office:value="84666.6666666667" calcext:value-type="float">
            <text:p>84666.67</text:p>
          </table:table-cell>
          <table:table-cell table:style-name="ce20" table:formula="of:=INDEX([.C15:.C34];MATCH(3014;[.A15:.A34];0))" office:value-type="string" office:string-value="HR" calcext:value-type="string">
            <text:p>HR</text:p>
          </table:table-cell>
          <table:table-cell table:style-name="ce27" table:formula="of:=ROUND([.D15];0)" office:value-type="float" office:value="84667" calcext:value-type="float">
            <text:p><text:s/>₹ 84,667.00 </text:p>
          </table:table-cell>
          <table:table-cell table:style-name="ce28" table:formula="of:=COM.MICROSOFT.CEILING([.D15];100)" office:value-type="float" office:value="84700" calcext:value-type="float">
            <text:p>84700</text:p>
          </table:table-cell>
          <table:table-cell table:style-name="ce28" table:formula="of:=COM.MICROSOFT.FLOOR([.D15];100)" office:value-type="float" office:value="84600" calcext:value-type="float">
            <text:p>846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5" calcext:value-type="float">
            <text:p>3015</text:p>
          </table:table-cell>
          <table:table-cell table:style-name="ce20" office:value-type="string" calcext:value-type="string">
            <text:p>Aarav Pandey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4952.3809523809" calcext:value-type="float">
            <text:p><text:s/>₹ 84,952.38 </text:p>
          </table:table-cell>
          <table:table-cell table:style-name="ce22" office:value-type="date" office:date-value="2026-01-15" calcext:value-type="date">
            <text:p>15/01/2026</text:p>
          </table:table-cell>
          <table:table-cell table:style-name="ce20" table:formula="of:=UPPER([.B16])" office:value-type="string" office:string-value="AARAV PANDEY" calcext:value-type="string">
            <text:p>AARAV PANDEY</text:p>
          </table:table-cell>
          <table:table-cell table:style-name="ce20" table:formula="of:=LOWER([.B16])" office:value-type="string" office:string-value="aarav pandey" calcext:value-type="string">
            <text:p>aarav pandey</text:p>
          </table:table-cell>
          <table:table-cell table:style-name="ce20" table:formula="of:=DATEDIF([.E16];TODAY();&quot;Y&quot;)" office:value-type="float" office:value="0" calcext:value-type="float">
            <text:p>0</text:p>
          </table:table-cell>
          <table:table-cell table:style-name="ce20" table:formula="of:=TODAY()-[.E16]" office:value-type="float" office:value="122" calcext:value-type="float">
            <text:p>122</text:p>
          </table:table-cell>
          <table:table-cell table:style-name="ce25" table:formula="of:=_xlfn.xlookup(3015;[.A16:.A40];[.D16:.D40])" office:value-type="float" office:value="84952.3809523809" calcext:value-type="float">
            <text:p>84952.38</text:p>
          </table:table-cell>
          <table:table-cell table:style-name="ce20" table:formula="of:=INDEX([.C16:.C35];MATCH(3015;[.A16:.A35];0))" office:value-type="string" office:string-value="HR" calcext:value-type="string">
            <text:p>HR</text:p>
          </table:table-cell>
          <table:table-cell table:style-name="ce27" table:formula="of:=ROUND([.D16];0)" office:value-type="float" office:value="84952" calcext:value-type="float">
            <text:p><text:s/>₹ 84,952.00 </text:p>
          </table:table-cell>
          <table:table-cell table:style-name="ce28" table:formula="of:=COM.MICROSOFT.CEILING([.D16];100)" office:value-type="float" office:value="85000" calcext:value-type="float">
            <text:p>85000</text:p>
          </table:table-cell>
          <table:table-cell table:style-name="ce28" table:formula="of:=COM.MICROSOFT.FLOOR([.D16];100)" office:value-type="float" office:value="84900" calcext:value-type="float">
            <text:p>849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6" calcext:value-type="float">
            <text:p>3016</text:p>
          </table:table-cell>
          <table:table-cell table:style-name="ce20" office:value-type="string" calcext:value-type="string">
            <text:p>Dhaval Prajapati</text:p>
          </table:table-cell>
          <table:table-cell table:style-name="ce18" office:value-type="string" calcext:value-type="string">
            <text:p>Finance</text:p>
          </table:table-cell>
          <table:table-cell table:style-name="ce21" office:value-type="float" office:value="85238.0952380952" calcext:value-type="float">
            <text:p><text:s/>₹ 85,238.10 </text:p>
          </table:table-cell>
          <table:table-cell table:style-name="ce22" office:value-type="date" office:date-value="2026-01-16" calcext:value-type="date">
            <text:p>16/01/2026</text:p>
          </table:table-cell>
          <table:table-cell table:style-name="ce20" table:formula="of:=UPPER([.B17])" office:value-type="string" office:string-value="DHAVAL PRAJAPATI" calcext:value-type="string">
            <text:p>DHAVAL PRAJAPATI</text:p>
          </table:table-cell>
          <table:table-cell table:style-name="ce20" table:formula="of:=LOWER([.B17])" office:value-type="string" office:string-value="dhaval prajapati" calcext:value-type="string">
            <text:p>dhaval prajapati</text:p>
          </table:table-cell>
          <table:table-cell table:style-name="ce20" table:formula="of:=DATEDIF([.E17];TODAY();&quot;Y&quot;)" office:value-type="float" office:value="0" calcext:value-type="float">
            <text:p>0</text:p>
          </table:table-cell>
          <table:table-cell table:style-name="ce20" table:formula="of:=TODAY()-[.E17]" office:value-type="float" office:value="121" calcext:value-type="float">
            <text:p>121</text:p>
          </table:table-cell>
          <table:table-cell table:style-name="ce25" table:formula="of:=_xlfn.xlookup(3016;[.A17:.A41];[.D17:.D41])" office:value-type="float" office:value="85238.0952380952" calcext:value-type="float">
            <text:p>85238.10</text:p>
          </table:table-cell>
          <table:table-cell table:style-name="ce20" table:formula="of:=INDEX([.C17:.C36];MATCH(3016;[.A17:.A36];0))" office:value-type="string" office:string-value="Finance" calcext:value-type="string">
            <text:p>Finance</text:p>
          </table:table-cell>
          <table:table-cell table:style-name="ce27" table:formula="of:=ROUND([.D17];0)" office:value-type="float" office:value="85238" calcext:value-type="float">
            <text:p><text:s/>₹ 85,238.00 </text:p>
          </table:table-cell>
          <table:table-cell table:style-name="ce28" table:formula="of:=COM.MICROSOFT.CEILING([.D17];100)" office:value-type="float" office:value="85300" calcext:value-type="float">
            <text:p>85300</text:p>
          </table:table-cell>
          <table:table-cell table:style-name="ce28" table:formula="of:=COM.MICROSOFT.FLOOR([.D17];100)" office:value-type="float" office:value="85200" calcext:value-type="float">
            <text:p>852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7" calcext:value-type="float">
            <text:p>3017</text:p>
          </table:table-cell>
          <table:table-cell table:style-name="ce20" office:value-type="string" calcext:value-type="string">
            <text:p>Yogesh Prajapati</text:p>
          </table:table-cell>
          <table:table-cell table:style-name="ce18" office:value-type="string" calcext:value-type="string">
            <text:p>HR</text:p>
          </table:table-cell>
          <table:table-cell table:style-name="ce21" office:value-type="float" office:value="85523.8095238095" calcext:value-type="float">
            <text:p><text:s/>₹ 85,523.81 </text:p>
          </table:table-cell>
          <table:table-cell table:style-name="ce22" office:value-type="date" office:date-value="2026-01-17" calcext:value-type="date">
            <text:p>17/01/2026</text:p>
          </table:table-cell>
          <table:table-cell table:style-name="ce20" table:formula="of:=UPPER([.B18])" office:value-type="string" office:string-value="YOGESH PRAJAPATI" calcext:value-type="string">
            <text:p>YOGESH PRAJAPATI</text:p>
          </table:table-cell>
          <table:table-cell table:style-name="ce20" table:formula="of:=LOWER([.B18])" office:value-type="string" office:string-value="yogesh prajapati" calcext:value-type="string">
            <text:p>yogesh prajapati</text:p>
          </table:table-cell>
          <table:table-cell table:style-name="ce20" table:formula="of:=DATEDIF([.E18];TODAY();&quot;Y&quot;)" office:value-type="float" office:value="0" calcext:value-type="float">
            <text:p>0</text:p>
          </table:table-cell>
          <table:table-cell table:style-name="ce20" table:formula="of:=TODAY()-[.E18]" office:value-type="float" office:value="120" calcext:value-type="float">
            <text:p>120</text:p>
          </table:table-cell>
          <table:table-cell table:style-name="ce25" table:formula="of:=_xlfn.xlookup(3017;[.A18:.A42];[.D18:.D42])" office:value-type="float" office:value="85523.8095238095" calcext:value-type="float">
            <text:p>85523.81</text:p>
          </table:table-cell>
          <table:table-cell table:style-name="ce20" table:formula="of:=INDEX([.C18:.C37];MATCH(3017;[.A18:.A37];0))" office:value-type="string" office:string-value="HR" calcext:value-type="string">
            <text:p>HR</text:p>
          </table:table-cell>
          <table:table-cell table:style-name="ce27" table:formula="of:=ROUND([.D18];0)" office:value-type="float" office:value="85524" calcext:value-type="float">
            <text:p><text:s/>₹ 85,524.00 </text:p>
          </table:table-cell>
          <table:table-cell table:style-name="ce28" table:formula="of:=COM.MICROSOFT.CEILING([.D18];100)" office:value-type="float" office:value="85600" calcext:value-type="float">
            <text:p>85600</text:p>
          </table:table-cell>
          <table:table-cell table:style-name="ce28" table:formula="of:=COM.MICROSOFT.FLOOR([.D18];100)" office:value-type="float" office:value="85500" calcext:value-type="float">
            <text:p>855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8" calcext:value-type="float">
            <text:p>3018</text:p>
          </table:table-cell>
          <table:table-cell table:style-name="ce20" office:value-type="string" calcext:value-type="string">
            <text:p>Mahesh Chaubey</text:p>
          </table:table-cell>
          <table:table-cell table:style-name="ce18" office:value-type="string" calcext:value-type="string">
            <text:p>IT</text:p>
          </table:table-cell>
          <table:table-cell table:style-name="ce21" office:value-type="float" office:value="85809.5238095238" calcext:value-type="float">
            <text:p><text:s/>₹ 85,809.52 </text:p>
          </table:table-cell>
          <table:table-cell table:style-name="ce22" office:value-type="date" office:date-value="2026-01-18" calcext:value-type="date">
            <text:p>18/01/2026</text:p>
          </table:table-cell>
          <table:table-cell table:style-name="ce20" table:formula="of:=UPPER([.B19])" office:value-type="string" office:string-value="MAHESH CHAUBEY" calcext:value-type="string">
            <text:p>MAHESH CHAUBEY</text:p>
          </table:table-cell>
          <table:table-cell table:style-name="ce20" table:formula="of:=LOWER([.B19])" office:value-type="string" office:string-value="mahesh chaubey" calcext:value-type="string">
            <text:p>mahesh chaubey</text:p>
          </table:table-cell>
          <table:table-cell table:style-name="ce20" table:formula="of:=DATEDIF([.E19];TODAY();&quot;Y&quot;)" office:value-type="float" office:value="0" calcext:value-type="float">
            <text:p>0</text:p>
          </table:table-cell>
          <table:table-cell table:style-name="ce20" table:formula="of:=TODAY()-[.E19]" office:value-type="float" office:value="119" calcext:value-type="float">
            <text:p>119</text:p>
          </table:table-cell>
          <table:table-cell table:style-name="ce25" table:formula="of:=_xlfn.xlookup(3018;[.A19:.A43];[.D19:.D43])" office:value-type="float" office:value="85809.5238095238" calcext:value-type="float">
            <text:p>85809.52</text:p>
          </table:table-cell>
          <table:table-cell table:style-name="ce20" table:formula="of:=INDEX([.C19:.C38];MATCH(3018;[.A19:.A38];0))" office:value-type="string" office:string-value="IT" calcext:value-type="string">
            <text:p>IT</text:p>
          </table:table-cell>
          <table:table-cell table:style-name="ce27" table:formula="of:=ROUND([.D19];0)" office:value-type="float" office:value="85810" calcext:value-type="float">
            <text:p><text:s/>₹ 85,810.00 </text:p>
          </table:table-cell>
          <table:table-cell table:style-name="ce28" table:formula="of:=COM.MICROSOFT.CEILING([.D19];100)" office:value-type="float" office:value="85900" calcext:value-type="float">
            <text:p>85900</text:p>
          </table:table-cell>
          <table:table-cell table:style-name="ce28" table:formula="of:=COM.MICROSOFT.FLOOR([.D19];100)" office:value-type="float" office:value="85800" calcext:value-type="float">
            <text:p>858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19" calcext:value-type="float">
            <text:p>3019</text:p>
          </table:table-cell>
          <table:table-cell table:style-name="ce20" office:value-type="string" calcext:value-type="string">
            <text:p>Sarish kharwar</text:p>
          </table:table-cell>
          <table:table-cell table:style-name="ce18" office:value-type="string" calcext:value-type="string">
            <text:p>Marketing</text:p>
          </table:table-cell>
          <table:table-cell table:style-name="ce21" office:value-type="float" office:value="86095.2380952381" calcext:value-type="float">
            <text:p><text:s/>₹ 86,095.24 </text:p>
          </table:table-cell>
          <table:table-cell table:style-name="ce22" office:value-type="date" office:date-value="2026-01-19" calcext:value-type="date">
            <text:p>19/01/2026</text:p>
          </table:table-cell>
          <table:table-cell table:style-name="ce20" table:formula="of:=UPPER([.B20])" office:value-type="string" office:string-value="SARISH KHARWAR" calcext:value-type="string">
            <text:p>SARISH KHARWAR</text:p>
          </table:table-cell>
          <table:table-cell table:style-name="ce20" table:formula="of:=LOWER([.B20])" office:value-type="string" office:string-value="sarish kharwar" calcext:value-type="string">
            <text:p>sarish kharwar</text:p>
          </table:table-cell>
          <table:table-cell table:style-name="ce20" table:formula="of:=DATEDIF([.E20];TODAY();&quot;Y&quot;)" office:value-type="float" office:value="0" calcext:value-type="float">
            <text:p>0</text:p>
          </table:table-cell>
          <table:table-cell table:style-name="ce20" table:formula="of:=TODAY()-[.E20]" office:value-type="float" office:value="118" calcext:value-type="float">
            <text:p>118</text:p>
          </table:table-cell>
          <table:table-cell table:style-name="ce25" table:formula="of:=_xlfn.xlookup(3019;[.A20:.A44];[.D20:.D44])" office:value-type="float" office:value="86095.2380952381" calcext:value-type="float">
            <text:p>86095.24</text:p>
          </table:table-cell>
          <table:table-cell table:style-name="ce20" table:formula="of:=INDEX([.C20:.C39];MATCH(3019;[.A20:.A39];0))" office:value-type="string" office:string-value="Marketing" calcext:value-type="string">
            <text:p>Marketing</text:p>
          </table:table-cell>
          <table:table-cell table:style-name="ce27" table:formula="of:=ROUND([.D20];0)" office:value-type="float" office:value="86095" calcext:value-type="float">
            <text:p><text:s/>₹ 86,095.00 </text:p>
          </table:table-cell>
          <table:table-cell table:style-name="ce28" table:formula="of:=COM.MICROSOFT.CEILING([.D20];100)" office:value-type="float" office:value="86100" calcext:value-type="float">
            <text:p>86100</text:p>
          </table:table-cell>
          <table:table-cell table:style-name="ce28" table:formula="of:=COM.MICROSOFT.FLOOR([.D20];100)" office:value-type="float" office:value="86000" calcext:value-type="float">
            <text:p>86000</text:p>
          </table:table-cell>
          <table:table-cell table:number-columns-repeated="16370"/>
        </table:table-row>
        <table:table-row table:style-name="ro3">
          <table:table-cell table:style-name="ce18" office:value-type="float" office:value="3020" calcext:value-type="float">
            <text:p>3020</text:p>
          </table:table-cell>
          <table:table-cell table:style-name="ce20" office:value-type="string" calcext:value-type="string">
            <text:p>Sarvesh Mishra</text:p>
          </table:table-cell>
          <table:table-cell table:style-name="ce18" office:value-type="string" calcext:value-type="string">
            <text:p>Marketing</text:p>
          </table:table-cell>
          <table:table-cell table:style-name="ce21" office:value-type="float" office:value="86380.9523809524" calcext:value-type="float">
            <text:p><text:s/>₹ 86,380.95 </text:p>
          </table:table-cell>
          <table:table-cell table:style-name="ce22" office:value-type="date" office:date-value="2026-01-10" calcext:value-type="date">
            <text:p>10/01/2026</text:p>
          </table:table-cell>
          <table:table-cell table:style-name="ce20" table:formula="of:=UPPER([.B21])" office:value-type="string" office:string-value="SARVESH MISHRA" calcext:value-type="string">
            <text:p>SARVESH MISHRA</text:p>
          </table:table-cell>
          <table:table-cell table:style-name="ce20" table:formula="of:=LOWER([.B21])" office:value-type="string" office:string-value="sarvesh mishra" calcext:value-type="string">
            <text:p>sarvesh mishra</text:p>
          </table:table-cell>
          <table:table-cell table:style-name="ce20" table:formula="of:=DATEDIF([.E21];TODAY();&quot;Y&quot;)" office:value-type="float" office:value="0" calcext:value-type="float">
            <text:p>0</text:p>
          </table:table-cell>
          <table:table-cell table:style-name="ce20" table:formula="of:=TODAY()-[.E21]" office:value-type="float" office:value="127" calcext:value-type="float">
            <text:p>127</text:p>
          </table:table-cell>
          <table:table-cell table:style-name="ce25" table:formula="of:=_xlfn.xlookup(3020;[.A21:.A45];[.D21:.D45])" office:value-type="float" office:value="86380.9523809524" calcext:value-type="float">
            <text:p>86380.95</text:p>
          </table:table-cell>
          <table:table-cell table:style-name="ce20" table:formula="of:=INDEX([.C21:.C40];MATCH(3020;[.A21:.A40];0))" office:value-type="string" office:string-value="Marketing" calcext:value-type="string">
            <text:p>Marketing</text:p>
          </table:table-cell>
          <table:table-cell table:style-name="ce27" table:formula="of:=ROUND([.D21];0)" office:value-type="float" office:value="86381" calcext:value-type="float">
            <text:p><text:s/>₹ 86,381.00 </text:p>
          </table:table-cell>
          <table:table-cell table:style-name="ce28" table:formula="of:=COM.MICROSOFT.CEILING([.D21];100)" office:value-type="float" office:value="86400" calcext:value-type="float">
            <text:p>86400</text:p>
          </table:table-cell>
          <table:table-cell table:style-name="ce28" table:formula="of:=COM.MICROSOFT.FLOOR([.D21];100)" office:value-type="float" office:value="86300" calcext:value-type="float">
            <text:p>86300</text:p>
          </table:table-cell>
          <table:table-cell table:number-columns-repeated="16370"/>
        </table:table-row>
        <table:table-row table:style-name="ro3">
          <table:table-cell table:style-name="ce19" table:number-columns-repeated="5"/>
          <table:table-cell table:style-name="ce19" table:formula="of:=UPPER([.B22])">
            <text:p/>
          </table:table-cell>
          <table:table-cell table:style-name="ce19" table:number-columns-repeated="4"/>
          <table:table-cell table:number-columns-repeated="16374"/>
        </table:table-row>
        <table:table-row table:style-name="ro3">
          <table:table-cell table:style-name="ce19" table:number-columns-repeated="5"/>
          <table:table-cell table:style-name="ce19" table:formula="of:=UPPER([.B23])">
            <text:p/>
          </table:table-cell>
          <table:table-cell table:style-name="ce19" table:number-columns-repeated="4"/>
          <table:table-cell table:number-columns-repeated="16374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Calibri, sans-serif" svg:font-family="'Calibri, sans-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₹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les" style:display-name="PageStyle_Sa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loyees" style:display-name="PageStyle_Employe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ject_20_Instructions" style:display-name="PageStyle_Project Instru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2T06:27:45</meta:creation-date>
    <meta:initial-creator>unsharma07@gmail.com</meta:initial-creator>
    <dc:language>en-IN</dc:language>
    <dc:creator>unsharma07@gmail.com</dc:creator>
    <dc:date>2026-05-13T10:59:35</dc:date>
    <meta:editing-cycles>0</meta:editing-cycles>
    <meta:editing-duration>P0D</meta:editing-duration>
    <meta:generator>PPT_Plus/1.0.0.0$Windows_X86_64 LibreOffice_project/</meta:generator>
    <meta:document-statistic meta:table-count="4" meta:cell-count="867" meta:object-count="0"/>
    <meta:user-defined meta:name="AppVersion">15.0000</meta:user-defined>
  </office:meta>
</office:document-meta>
</file>